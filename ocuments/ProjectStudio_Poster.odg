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800000078DE2D787A.png" manifest:media-type="image/png"/>
  <manifest:file-entry manifest:full-path="Pictures/1000024100000D5500000D5567282A1D.svg" manifest:media-type="image/svg+xml"/>
  <manifest:file-entry manifest:full-path="Pictures/10000001000003E8000003E81FA5700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ZapfDingbats" svg:font-family="ZapfDingbat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a2540" loext:decorative="false"/>
    </style:style>
    <style:style style:name="gr2" style:family="graphic" style:parent-style-name="standard">
      <style:graphic-properties draw:stroke="none" draw:fill="solid" draw:fill-color="#0a2642" loext:decorative="false"/>
    </style:style>
    <style:style style:name="gr3" style:family="graphic" style:parent-style-name="standard">
      <style:graphic-properties draw:stroke="none" draw:fill="solid" draw:fill-color="#0a2845" loext:decorative="false"/>
    </style:style>
    <style:style style:name="gr4" style:family="graphic" style:parent-style-name="standard">
      <style:graphic-properties draw:stroke="none" draw:fill="solid" draw:fill-color="#0b2948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b2b4b" loext:decorative="false"/>
    </style:style>
    <style:style style:name="gr6" style:family="graphic" style:parent-style-name="standard">
      <style:graphic-properties draw:stroke="none" draw:fill="solid" draw:fill-color="#0b2d4d" loext:decorative="false"/>
    </style:style>
    <style:style style:name="gr7" style:family="graphic" style:parent-style-name="standard">
      <style:graphic-properties draw:stroke="none" draw:fill="solid" draw:fill-color="#0c2e50" loext:decorative="false"/>
    </style:style>
    <style:style style:name="gr8" style:family="graphic" style:parent-style-name="standard">
      <style:graphic-properties draw:stroke="none" draw:fill="solid" draw:fill-color="#0c3053" loext:decorative="false"/>
    </style:style>
    <style:style style:name="gr9" style:family="graphic" style:parent-style-name="standard">
      <style:graphic-properties draw:stroke="none" draw:fill="solid" draw:fill-color="#0c3256" loext:decorative="false"/>
    </style:style>
    <style:style style:name="gr10" style:family="graphic" style:parent-style-name="standard">
      <style:graphic-properties draw:stroke="none" draw:fill="solid" draw:fill-color="#0d3358" loext:decorative="false"/>
    </style:style>
    <style:style style:name="gr11" style:family="graphic" style:parent-style-name="standard">
      <style:graphic-properties draw:stroke="none" draw:fill="solid" draw:fill-color="#0d355b" loext:decorative="false"/>
    </style:style>
    <style:style style:name="gr12" style:family="graphic" style:parent-style-name="standard">
      <style:graphic-properties draw:stroke="none" draw:fill="solid" draw:fill-color="#0d375e" loext:decorative="false"/>
    </style:style>
    <style:style style:name="gr13" style:family="graphic" style:parent-style-name="standard">
      <style:graphic-properties draw:stroke="none" draw:fill="solid" draw:fill-color="#0e3861" loext:decorative="false"/>
    </style:style>
    <style:style style:name="gr14" style:family="graphic" style:parent-style-name="standard">
      <style:graphic-properties draw:stroke="none" draw:fill="solid" draw:fill-color="#0e3a63" loext:decorative="false"/>
    </style:style>
    <style:style style:name="gr15" style:family="graphic" style:parent-style-name="standard">
      <style:graphic-properties draw:stroke="none" draw:fill="solid" draw:fill-color="#0e3c66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0f3d69" loext:decorative="false"/>
    </style:style>
    <style:style style:name="gr17" style:family="graphic" style:parent-style-name="standard">
      <style:graphic-properties draw:stroke="none" draw:fill="solid" draw:fill-color="#0f3f6c" loext:decorative="false"/>
    </style:style>
    <style:style style:name="gr18" style:family="graphic" style:parent-style-name="standard">
      <style:graphic-properties draw:stroke="none" draw:fill="solid" draw:fill-color="#0f416e" loext:decorative="false"/>
    </style:style>
    <style:style style:name="gr19" style:family="graphic" style:parent-style-name="standard">
      <style:graphic-properties draw:stroke="none" draw:fill="solid" draw:fill-color="#104271" loext:decorative="false"/>
    </style:style>
    <style:style style:name="gr20" style:family="graphic" style:parent-style-name="standard">
      <style:graphic-properties draw:stroke="none" draw:fill="solid" draw:fill-color="#104474" loext:decorative="false"/>
    </style:style>
    <style:style style:name="gr21" style:family="graphic" style:parent-style-name="standard">
      <style:graphic-properties draw:stroke="none" draw:fill="solid" draw:fill-color="#104677" loext:decorative="false"/>
    </style:style>
    <style:style style:name="gr22" style:family="graphic" style:parent-style-name="standard">
      <style:graphic-properties draw:stroke="none" draw:fill="solid" draw:fill-color="#114779" loext:decorative="false"/>
    </style:style>
    <style:style style:name="gr23" style:family="graphic" style:parent-style-name="standard">
      <style:graphic-properties draw:stroke="none" draw:fill="solid" draw:fill-color="#11497c" loext:decorative="false"/>
    </style:style>
    <style:style style:name="gr24" style:family="graphic" style:parent-style-name="standard">
      <style:graphic-properties draw:stroke="none" draw:fill="solid" draw:fill-color="#114a7f" loext:decorative="false"/>
    </style:style>
    <style:style style:name="gr25" style:family="graphic" style:parent-style-name="standard">
      <style:graphic-properties draw:stroke="none" draw:fill="solid" draw:fill-color="#124c82" loext:decorative="false"/>
    </style:style>
    <style:style style:name="gr26" style:family="graphic" style:parent-style-name="standard">
      <style:graphic-properties draw:stroke="none" draw:fill="solid" draw:fill-color="#124e84" loext:decorative="false"/>
    </style:style>
    <style:style style:name="gr27" style:family="graphic" style:parent-style-name="standard">
      <style:graphic-properties draw:stroke="none" draw:fill="solid" draw:fill-color="#124f87" loext:decorative="false"/>
    </style:style>
    <style:style style:name="gr28" style:family="graphic" style:parent-style-name="standard">
      <style:graphic-properties draw:stroke="none" draw:fill="solid" draw:fill-color="#13518a" loext:decorative="false"/>
    </style:style>
    <style:style style:name="gr29" style:family="graphic" style:parent-style-name="standard">
      <style:graphic-properties draw:stroke="none" draw:fill="solid" draw:fill-color="#13538d" loext:decorative="false"/>
    </style:style>
    <style:style style:name="gr30" style:family="graphic" style:parent-style-name="standard">
      <style:graphic-properties draw:stroke="none" draw:fill="solid" draw:fill-color="#13548f" loext:decorative="false"/>
    </style:style>
    <style:style style:name="gr31" style:family="graphic" style:parent-style-name="standard">
      <style:graphic-properties draw:stroke="none" draw:fill="solid" draw:fill-color="#145692" loext:decorative="false"/>
    </style:style>
    <style:style style:name="gr32" style:family="graphic" style:parent-style-name="standard">
      <style:graphic-properties draw:stroke="none" draw:fill="solid" draw:fill-color="#145895" loext:decorative="false"/>
    </style:style>
    <style:style style:name="gr33" style:family="graphic" style:parent-style-name="standard">
      <style:graphic-properties draw:stroke="none" draw:fill="solid" draw:fill-color="#145998" loext:decorative="false"/>
    </style:style>
    <style:style style:name="gr34" style:family="graphic" style:parent-style-name="standard">
      <style:graphic-properties draw:stroke="none" draw:fill="solid" draw:fill-color="#155b9a" loext:decorative="false"/>
    </style:style>
    <style:style style:name="gr35" style:family="graphic" style:parent-style-name="standard">
      <style:graphic-properties draw:stroke="none" draw:fill="solid" draw:fill-color="#155d9d" loext:decorative="false"/>
    </style:style>
    <style:style style:name="gr36" style:family="graphic" style:parent-style-name="standard">
      <style:graphic-properties draw:stroke="none" draw:fill="solid" draw:fill-color="#155ea0" loext:decorative="false"/>
    </style:style>
    <style:style style:name="gr37" style:family="graphic" style:parent-style-name="standard">
      <style:graphic-properties draw:stroke="none" draw:fill="solid" draw:fill-color="#1660a3" loext:decorative="false"/>
    </style:style>
    <style:style style:name="gr38" style:family="graphic" style:parent-style-name="standard">
      <style:graphic-properties draw:stroke="none" draw:fill="solid" draw:fill-color="#1662a5" loext:decorative="false"/>
    </style:style>
    <style:style style:name="gr39" style:family="graphic" style:parent-style-name="standard">
      <style:graphic-properties draw:stroke="none" draw:fill="solid" draw:fill-color="#1663a8" loext:decorative="false"/>
    </style:style>
    <style:style style:name="gr40" style:family="graphic" style:parent-style-name="standard">
      <style:graphic-properties draw:stroke="none" draw:fill="solid" draw:fill-color="#1765ab" loext:decorative="false"/>
    </style:style>
    <style:style style:name="gr41" style:family="graphic" style:parent-style-name="standard">
      <style:graphic-properties draw:stroke="none" draw:fill="solid" draw:fill-color="#1767ae" loext:decorative="false"/>
    </style:style>
    <style:style style:name="gr42" style:family="graphic" style:parent-style-name="standard">
      <style:graphic-properties draw:stroke="none" draw:fill="solid" draw:fill-color="#1768b0" loext:decorative="false"/>
    </style:style>
    <style:style style:name="gr43" style:family="graphic" style:parent-style-name="standard">
      <style:graphic-properties draw:stroke="none" draw:fill="solid" draw:fill-color="#186ab3" loext:decorative="false"/>
    </style:style>
    <style:style style:name="gr44" style:family="graphic" style:parent-style-name="standard">
      <style:graphic-properties draw:stroke="none" draw:fill="solid" draw:fill-color="#186bb6" loext:decorative="false"/>
    </style:style>
    <style:style style:name="gr45" style:family="graphic" style:parent-style-name="standard">
      <style:graphic-properties draw:stroke="none" draw:fill="solid" draw:fill-color="#186db9" loext:decorative="false"/>
    </style:style>
    <style:style style:name="gr46" style:family="graphic" style:parent-style-name="standard">
      <style:graphic-properties draw:stroke="none" draw:fill="solid" draw:fill-color="#196fbb" loext:decorative="false"/>
    </style:style>
    <style:style style:name="gr47" style:family="graphic" style:parent-style-name="standard">
      <style:graphic-properties draw:stroke="none" draw:fill="solid" draw:fill-color="#1970be" loext:decorative="false"/>
    </style:style>
    <style:style style:name="gr48" style:family="graphic" style:parent-style-name="standard">
      <style:graphic-properties draw:stroke="none" draw:fill="solid" draw:fill-color="#1972c1" loext:decorative="false"/>
    </style:style>
    <style:style style:name="gr49" style:family="graphic" style:parent-style-name="standard">
      <style:graphic-properties draw:stroke="none" draw:fill="solid" draw:fill-color="#1a74c4" loext:decorative="false"/>
    </style:style>
    <style:style style:name="gr50" style:family="graphic" style:parent-style-name="standard">
      <style:graphic-properties draw:stroke="none" draw:fill="solid" draw:fill-color="#1a75c6" loext:decorative="false"/>
    </style:style>
    <style:style style:name="gr51" style:family="graphic" style:parent-style-name="standard">
      <style:graphic-properties draw:stroke="none" draw:fill="solid" draw:fill-color="#1a77c9" loext:decorative="false"/>
    </style:style>
    <style:style style:name="gr52" style:family="graphic" style:parent-style-name="standard">
      <style:graphic-properties draw:stroke="none" draw:fill="solid" draw:fill-color="#1b79cc" loext:decorative="false"/>
    </style:style>
    <style:style style:name="gr53" style:family="graphic" style:parent-style-name="standard">
      <style:graphic-properties draw:stroke="none" draw:fill="solid" draw:fill-color="#1b7acf" loext:decorative="false"/>
    </style:style>
    <style:style style:name="gr54" style:family="graphic" style:parent-style-name="standard">
      <style:graphic-properties draw:stroke="none" draw:fill="solid" draw:fill-color="#1b7cd1" loext:decorative="false"/>
    </style:style>
    <style:style style:name="gr55" style:family="graphic" style:parent-style-name="standard">
      <style:graphic-properties draw:stroke="none" draw:fill="solid" draw:fill-color="#1c7ed4" loext:decorative="false"/>
    </style:style>
    <style:style style:name="gr56" style:family="graphic" style:parent-style-name="standard">
      <style:graphic-properties draw:stroke="none" draw:fill="solid" draw:fill-color="#1c7fd7" loext:decorative="false"/>
    </style:style>
    <style:style style:name="gr57" style:family="graphic" style:parent-style-name="standard">
      <style:graphic-properties draw:stroke="none" draw:fill="solid" draw:fill-color="#1c81da" loext:decorative="false"/>
    </style:style>
    <style:style style:name="gr58" style:family="graphic" style:parent-style-name="standard">
      <style:graphic-properties draw:stroke="none" draw:fill="solid" draw:fill-color="#1d83dc" loext:decorative="false"/>
    </style:style>
    <style:style style:name="gr59" style:family="graphic" style:parent-style-name="standard">
      <style:graphic-properties draw:stroke="none" draw:fill="solid" draw:fill-color="#1d84df" loext:decorative="false"/>
    </style:style>
    <style:style style:name="gr60" style:family="graphic" style:parent-style-name="standard">
      <style:graphic-properties draw:stroke="none" draw:fill="solid" draw:fill-color="#1d86e2" loext:decorative="false"/>
    </style:style>
    <style:style style:name="gr61" style:family="graphic" style:parent-style-name="standard">
      <style:graphic-properties draw:stroke="none" draw:fill="solid" draw:fill-color="#65c033" loext:decorative="false"/>
    </style:style>
    <style:style style:name="gr62" style:family="graphic" style:parent-style-name="standard">
      <style:graphic-properties draw:stroke="none" draw:fill="solid" draw:fill-color="#b6f622" loext:decorative="false"/>
    </style:style>
    <style:style style:name="gr63" style:family="graphic" style:parent-style-name="standard">
      <style:graphic-properties draw:stroke="none" draw:fill="solid" draw:fill-color="#88e544" loext:decorative="false"/>
    </style:style>
    <style:style style:name="gr64" style:family="graphic" style:parent-style-name="standard">
      <style:graphic-properties draw:stroke="none" draw:fill="solid" draw:fill-color="#ffff22" loext:decorative="false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39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11.648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13.049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stroke-linejoin="round" svg:stroke-linecap="round" draw:fill="solid" draw:fill-color="#ffffff" loext:decorative="false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404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0.34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0.646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704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0.328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721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0.37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7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0.48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solid" svg:stroke-width="0.017cm" svg:stroke-color="#90caf9" draw:stroke-linejoin="miter" svg:stroke-linecap="butt" draw:fill="none" fo:padding-top="0.008cm" fo:padding-bottom="0.008cm" fo:padding-left="0.008cm" fo:padding-right="0.008cm" loext:decorative="false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407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323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solid" draw:fill-color="#caf955" loext:decorative="false"/>
    </style:style>
    <style:style style:name="gr82" style:family="graphic" style:parent-style-name="standard">
      <style:graphic-properties draw:stroke="solid" svg:stroke-width="0.035cm" svg:stroke-color="#90caf9" draw:stroke-linejoin="miter" svg:stroke-linecap="butt" draw:fill="solid" draw:fill-color="#e3f2fd" fo:padding-top="0.017cm" fo:padding-bottom="0.017cm" fo:padding-left="0.017cm" fo:padding-right="0.017cm" loext:decorative="false"/>
    </style:style>
    <style:style style:name="gr83" style:family="graphic" style:parent-style-name="standard">
      <style:graphic-properties draw:stroke="none" draw:fill="solid" draw:fill-color="#1565c0" loext:decorative="false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2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661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042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solid" draw:fill-color="#b3e5fc" loext:decorative="false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106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667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629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solid" draw:fill-color="#ffffff" loext:decorative="false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844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082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solid" svg:stroke-width="0.035cm" svg:stroke-color="#90caf9" draw:stroke-linejoin="miter" svg:stroke-linecap="butt" draw:fill="solid" draw:fill-color="#e1f5fe" fo:padding-top="0.017cm" fo:padding-bottom="0.017cm" fo:padding-left="0.017cm" fo:padding-right="0.017cm" loext:decorative="false"/>
    </style:style>
    <style:style style:name="gr95" style:family="graphic" style:parent-style-name="standard">
      <style:graphic-properties draw:stroke="none" draw:fill="solid" draw:fill-color="#1e88e5" loext:decorative="false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032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542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021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971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476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764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09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65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012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906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86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887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531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192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898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dash" draw:stroke-dash="stroke-dash226" svg:stroke-width="0.042cm" svg:stroke-color="#90caf9" draw:stroke-linejoin="miter" svg:stroke-linecap="butt" draw:fill="none" fo:padding-top="0.021cm" fo:padding-bottom="0.021cm" fo:padding-left="0.021cm" fo:padding-right="0.021cm" loext:decorative="false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87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543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993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95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903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163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551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839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74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23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721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921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44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solid" svg:stroke-width="0.028cm" svg:stroke-color="#90caf9" draw:stroke-linejoin="miter" svg:stroke-linecap="butt" draw:fill="solid" draw:fill-color="#e3f2fd" fo:padding-top="0.014cm" fo:padding-bottom="0.014cm" fo:padding-left="0.014cm" fo:padding-right="0.014cm" loext:decorative="false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284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687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53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45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59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72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6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solid" draw:fill-color="#90caf9" loext:decorative="false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66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272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7.482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4.676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85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694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64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1.089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solid" draw:fill-color="#dee6ef" loext:decorative="false"/>
    </style:style>
    <style:style style:name="gr143" style:family="graphic" style:parent-style-name="Object_20_with_20_no_20_fill_20_and_20_no_20_line">
      <style:graphic-properties draw:stroke="none" draw:stroke-linejoin="roun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5.383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3.6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3.355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4.633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fill-color="#ffffff" fo:min-height="0.838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5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5cm" fo:min-width="0cm" loext:decorative="false"/>
      <style:paragraph-properties style:writing-mode="lr-tb"/>
    </style:style>
    <style:style style:name="gr1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3" style:family="graphic" style:parent-style-name="standard">
      <style:graphic-properties draw:stroke="none" draw:fill="none" draw:fill-color="#ffffff" fo:min-height="0.938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solid" draw:fill-color="#0a2540"/>
    </style:style>
    <style:style style:name="P2" style:family="paragraph">
      <loext:graphic-properties draw:fill="solid" draw:fill-color="#0a2642"/>
    </style:style>
    <style:style style:name="P3" style:family="paragraph">
      <loext:graphic-properties draw:fill="solid" draw:fill-color="#0a2845"/>
    </style:style>
    <style:style style:name="P4" style:family="paragraph">
      <loext:graphic-properties draw:fill="solid" draw:fill-color="#0b2948"/>
    </style:style>
    <style:style style:name="P5" style:family="paragraph">
      <loext:graphic-properties draw:fill="solid" draw:fill-color="#0b2b4b"/>
    </style:style>
    <style:style style:name="P6" style:family="paragraph">
      <loext:graphic-properties draw:fill="solid" draw:fill-color="#0b2d4d"/>
    </style:style>
    <style:style style:name="P7" style:family="paragraph">
      <loext:graphic-properties draw:fill="solid" draw:fill-color="#0c2e50"/>
    </style:style>
    <style:style style:name="P8" style:family="paragraph">
      <loext:graphic-properties draw:fill="solid" draw:fill-color="#0c3053"/>
    </style:style>
    <style:style style:name="P9" style:family="paragraph">
      <loext:graphic-properties draw:fill="solid" draw:fill-color="#0c3256"/>
    </style:style>
    <style:style style:name="P10" style:family="paragraph">
      <loext:graphic-properties draw:fill="solid" draw:fill-color="#0d3358"/>
    </style:style>
    <style:style style:name="P11" style:family="paragraph">
      <loext:graphic-properties draw:fill="solid" draw:fill-color="#0d355b"/>
    </style:style>
    <style:style style:name="P12" style:family="paragraph">
      <loext:graphic-properties draw:fill="solid" draw:fill-color="#0d375e"/>
    </style:style>
    <style:style style:name="P13" style:family="paragraph">
      <loext:graphic-properties draw:fill="solid" draw:fill-color="#0e3861"/>
    </style:style>
    <style:style style:name="P14" style:family="paragraph">
      <loext:graphic-properties draw:fill="solid" draw:fill-color="#0e3a63"/>
    </style:style>
    <style:style style:name="P15" style:family="paragraph">
      <loext:graphic-properties draw:fill="solid" draw:fill-color="#0e3c66"/>
    </style:style>
    <style:style style:name="P16" style:family="paragraph">
      <loext:graphic-properties draw:fill="solid" draw:fill-color="#0f3d69"/>
    </style:style>
    <style:style style:name="P17" style:family="paragraph">
      <loext:graphic-properties draw:fill="solid" draw:fill-color="#0f3f6c"/>
    </style:style>
    <style:style style:name="P18" style:family="paragraph">
      <loext:graphic-properties draw:fill="solid" draw:fill-color="#0f416e"/>
    </style:style>
    <style:style style:name="P19" style:family="paragraph">
      <loext:graphic-properties draw:fill="solid" draw:fill-color="#104271"/>
    </style:style>
    <style:style style:name="P20" style:family="paragraph">
      <loext:graphic-properties draw:fill="solid" draw:fill-color="#104474"/>
    </style:style>
    <style:style style:name="P21" style:family="paragraph">
      <loext:graphic-properties draw:fill="solid" draw:fill-color="#104677"/>
    </style:style>
    <style:style style:name="P22" style:family="paragraph">
      <loext:graphic-properties draw:fill="solid" draw:fill-color="#114779"/>
    </style:style>
    <style:style style:name="P23" style:family="paragraph">
      <loext:graphic-properties draw:fill="solid" draw:fill-color="#11497c"/>
    </style:style>
    <style:style style:name="P24" style:family="paragraph">
      <loext:graphic-properties draw:fill="solid" draw:fill-color="#114a7f"/>
    </style:style>
    <style:style style:name="P25" style:family="paragraph">
      <loext:graphic-properties draw:fill="solid" draw:fill-color="#124c82"/>
    </style:style>
    <style:style style:name="P26" style:family="paragraph">
      <loext:graphic-properties draw:fill="solid" draw:fill-color="#124e84"/>
    </style:style>
    <style:style style:name="P27" style:family="paragraph">
      <loext:graphic-properties draw:fill="solid" draw:fill-color="#124f87"/>
    </style:style>
    <style:style style:name="P28" style:family="paragraph">
      <loext:graphic-properties draw:fill="solid" draw:fill-color="#13518a"/>
    </style:style>
    <style:style style:name="P29" style:family="paragraph">
      <loext:graphic-properties draw:fill="solid" draw:fill-color="#13538d"/>
    </style:style>
    <style:style style:name="P30" style:family="paragraph">
      <loext:graphic-properties draw:fill="solid" draw:fill-color="#13548f"/>
    </style:style>
    <style:style style:name="P31" style:family="paragraph">
      <loext:graphic-properties draw:fill="solid" draw:fill-color="#145692"/>
    </style:style>
    <style:style style:name="P32" style:family="paragraph">
      <loext:graphic-properties draw:fill="solid" draw:fill-color="#145895"/>
    </style:style>
    <style:style style:name="P33" style:family="paragraph">
      <loext:graphic-properties draw:fill="solid" draw:fill-color="#145998"/>
    </style:style>
    <style:style style:name="P34" style:family="paragraph">
      <loext:graphic-properties draw:fill="solid" draw:fill-color="#155b9a"/>
    </style:style>
    <style:style style:name="P35" style:family="paragraph">
      <loext:graphic-properties draw:fill="solid" draw:fill-color="#155d9d"/>
    </style:style>
    <style:style style:name="P36" style:family="paragraph">
      <loext:graphic-properties draw:fill="solid" draw:fill-color="#155ea0"/>
    </style:style>
    <style:style style:name="P37" style:family="paragraph">
      <loext:graphic-properties draw:fill="solid" draw:fill-color="#1660a3"/>
    </style:style>
    <style:style style:name="P38" style:family="paragraph">
      <loext:graphic-properties draw:fill="solid" draw:fill-color="#1662a5"/>
    </style:style>
    <style:style style:name="P39" style:family="paragraph">
      <loext:graphic-properties draw:fill="solid" draw:fill-color="#1663a8"/>
    </style:style>
    <style:style style:name="P40" style:family="paragraph">
      <loext:graphic-properties draw:fill="solid" draw:fill-color="#1765ab"/>
    </style:style>
    <style:style style:name="P41" style:family="paragraph">
      <loext:graphic-properties draw:fill="solid" draw:fill-color="#1767ae"/>
    </style:style>
    <style:style style:name="P42" style:family="paragraph">
      <loext:graphic-properties draw:fill="solid" draw:fill-color="#1768b0"/>
    </style:style>
    <style:style style:name="P43" style:family="paragraph">
      <loext:graphic-properties draw:fill="solid" draw:fill-color="#186ab3"/>
    </style:style>
    <style:style style:name="P44" style:family="paragraph">
      <loext:graphic-properties draw:fill="solid" draw:fill-color="#186bb6"/>
    </style:style>
    <style:style style:name="P45" style:family="paragraph">
      <loext:graphic-properties draw:fill="solid" draw:fill-color="#186db9"/>
    </style:style>
    <style:style style:name="P46" style:family="paragraph">
      <loext:graphic-properties draw:fill="solid" draw:fill-color="#196fbb"/>
    </style:style>
    <style:style style:name="P47" style:family="paragraph">
      <loext:graphic-properties draw:fill="solid" draw:fill-color="#1970be"/>
    </style:style>
    <style:style style:name="P48" style:family="paragraph">
      <loext:graphic-properties draw:fill="solid" draw:fill-color="#1972c1"/>
    </style:style>
    <style:style style:name="P49" style:family="paragraph">
      <loext:graphic-properties draw:fill="solid" draw:fill-color="#1a74c4"/>
    </style:style>
    <style:style style:name="P50" style:family="paragraph">
      <loext:graphic-properties draw:fill="solid" draw:fill-color="#1a75c6"/>
    </style:style>
    <style:style style:name="P51" style:family="paragraph">
      <loext:graphic-properties draw:fill="solid" draw:fill-color="#1a77c9"/>
    </style:style>
    <style:style style:name="P52" style:family="paragraph">
      <loext:graphic-properties draw:fill="solid" draw:fill-color="#1b79cc"/>
    </style:style>
    <style:style style:name="P53" style:family="paragraph">
      <loext:graphic-properties draw:fill="solid" draw:fill-color="#1b7acf"/>
    </style:style>
    <style:style style:name="P54" style:family="paragraph">
      <loext:graphic-properties draw:fill="solid" draw:fill-color="#1b7cd1"/>
    </style:style>
    <style:style style:name="P55" style:family="paragraph">
      <loext:graphic-properties draw:fill="solid" draw:fill-color="#1c7ed4"/>
    </style:style>
    <style:style style:name="P56" style:family="paragraph">
      <loext:graphic-properties draw:fill="solid" draw:fill-color="#1c7fd7"/>
    </style:style>
    <style:style style:name="P57" style:family="paragraph">
      <loext:graphic-properties draw:fill="solid" draw:fill-color="#1c81da"/>
    </style:style>
    <style:style style:name="P58" style:family="paragraph">
      <loext:graphic-properties draw:fill="solid" draw:fill-color="#1d83dc"/>
    </style:style>
    <style:style style:name="P59" style:family="paragraph">
      <loext:graphic-properties draw:fill="solid" draw:fill-color="#1d84df"/>
    </style:style>
    <style:style style:name="P60" style:family="paragraph">
      <loext:graphic-properties draw:fill="solid" draw:fill-color="#1d86e2"/>
    </style:style>
    <style:style style:name="P61" style:family="paragraph">
      <loext:graphic-properties draw:fill="solid" draw:fill-color="#65c033"/>
    </style:style>
    <style:style style:name="P62" style:family="paragraph">
      <loext:graphic-properties draw:fill="solid" draw:fill-color="#b6f622"/>
    </style:style>
    <style:style style:name="P63" style:family="paragraph">
      <loext:graphic-properties draw:fill="solid" draw:fill-color="#88e544"/>
    </style:style>
    <style:style style:name="P64" style:family="paragraph">
      <loext:graphic-properties draw:fill="solid" draw:fill-color="#ffff22"/>
    </style:style>
    <style:style style:name="P65" style:family="paragraph">
      <style:paragraph-properties fo:text-align="start" style:writing-mode="lr-tb"/>
    </style:style>
    <style:style style:name="P66" style:family="paragraph">
      <loext:graphic-properties draw:fill="none"/>
      <style:text-properties fo:font-size="9pt" style:font-size-asian="9pt" style:font-size-complex="9pt"/>
    </style:style>
    <style:style style:name="P67" style:family="paragraph">
      <loext:graphic-properties draw:fill="none"/>
      <style:text-properties fo:font-size="34pt" style:font-size-asian="34pt" style:font-size-complex="34pt"/>
    </style:style>
    <style:style style:name="P68" style:family="paragraph">
      <loext:graphic-properties draw:fill="solid" draw:fill-color="#ffffff"/>
    </style:style>
    <style:style style:name="P69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70" style:family="paragraph">
      <loext:graphic-properties draw:fill="none"/>
      <style:paragraph-properties fo:text-align="start"/>
      <style:text-properties fo:font-size="7.5pt" style:font-size-asian="7.5pt" style:font-size-complex="7.5pt"/>
    </style:style>
    <style:style style:name="P71" style:family="paragraph">
      <loext:graphic-properties draw:fill="none"/>
    </style:style>
    <style:style style:name="P72" style:family="paragraph">
      <loext:graphic-properties draw:fill="none"/>
      <style:text-properties fo:font-size="15pt" style:font-size-asian="15pt" style:font-size-complex="15pt"/>
    </style:style>
    <style:style style:name="P73" style:family="paragraph">
      <loext:graphic-properties draw:fill="solid" draw:fill-color="#caf955"/>
    </style:style>
    <style:style style:name="P74" style:family="paragraph">
      <loext:graphic-properties draw:fill="solid" draw:fill-color="#e3f2fd"/>
    </style:style>
    <style:style style:name="P75" style:family="paragraph">
      <loext:graphic-properties draw:fill="solid" draw:fill-color="#1565c0"/>
    </style:style>
    <style:style style:name="P76" style:family="paragraph">
      <loext:graphic-properties draw:fill="none"/>
      <style:text-properties fo:font-size="12pt" style:font-size-asian="12pt" style:font-size-complex="12pt"/>
    </style:style>
    <style:style style:name="P77" style:family="paragraph">
      <loext:graphic-properties draw:fill="none"/>
      <style:text-properties fo:font-size="8.5pt" style:font-size-asian="8.5pt" style:font-size-complex="8.5pt"/>
    </style:style>
    <style:style style:name="P78" style:family="paragraph">
      <loext:graphic-properties draw:fill="solid" draw:fill-color="#b3e5fc"/>
    </style:style>
    <style:style style:name="P79" style:family="paragraph">
      <loext:graphic-properties draw:fill="none"/>
      <style:text-properties fo:font-size="7pt" style:font-size-asian="7pt" style:font-size-complex="7pt"/>
    </style:style>
    <style:style style:name="P80" style:family="paragraph">
      <loext:graphic-properties draw:fill="none"/>
      <style:text-properties fo:font-size="11pt" style:font-size-asian="11pt" style:font-size-complex="11pt"/>
    </style:style>
    <style:style style:name="P81" style:family="paragraph">
      <loext:graphic-properties draw:fill="solid" draw:fill-color="#e1f5fe"/>
    </style:style>
    <style:style style:name="P82" style:family="paragraph">
      <loext:graphic-properties draw:fill="solid" draw:fill-color="#1e88e5"/>
    </style:style>
    <style:style style:name="P83" style:family="paragraph">
      <loext:graphic-properties draw:fill="none"/>
      <style:text-properties fo:font-size="13pt" style:font-size-asian="13pt" style:font-size-complex="13pt"/>
    </style:style>
    <style:style style:name="P84" style:family="paragraph">
      <loext:graphic-properties draw:fill="none"/>
      <style:text-properties fo:font-size="7.5pt" style:font-size-asian="7.5pt" style:font-size-complex="7.5pt"/>
    </style:style>
    <style:style style:name="P85" style:family="paragraph">
      <loext:graphic-properties draw:fill="none"/>
      <style:text-properties fo:font-size="8pt" style:font-size-asian="8pt" style:font-size-complex="8pt"/>
    </style:style>
    <style:style style:name="P86" style:family="paragraph">
      <loext:graphic-properties draw:fill="solid" draw:fill-color="#90caf9"/>
    </style:style>
    <style:style style:name="P87" style:family="paragraph">
      <loext:graphic-properties draw:fill="none"/>
      <style:paragraph-properties fo:text-align="start"/>
      <style:text-properties fo:font-size="6.5pt" style:font-size-asian="6.5pt" style:font-size-complex="6.5pt"/>
    </style:style>
    <style:style style:name="P88" style:family="paragraph">
      <loext:graphic-properties draw:fill="none"/>
      <style:paragraph-properties fo:text-align="start"/>
      <style:text-properties fo:font-size="17pt" style:font-size-asian="17pt" style:font-size-complex="17pt"/>
    </style:style>
    <style:style style:name="P89" style:family="paragraph">
      <style:paragraph-properties fo:text-align="center" style:writing-mode="lr-tb"/>
    </style:style>
    <style:style style:name="P90" style:family="paragraph">
      <loext:graphic-properties draw:fill="none"/>
      <style:paragraph-properties fo:text-align="center"/>
      <style:text-properties fo:font-size="17pt" style:font-size-asian="17pt" style:font-size-complex="17pt"/>
    </style:style>
    <style:style style:name="P91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92" style:family="paragraph">
      <loext:graphic-properties draw:fill="none"/>
      <style:text-properties fo:font-size="9.5pt" style:font-size-asian="9.5pt" style:font-size-complex="9.5pt"/>
    </style:style>
    <style:style style:name="P93" style:family="paragraph">
      <loext:graphic-properties draw:fill="none"/>
      <style:paragraph-properties fo:text-align="start"/>
      <style:text-properties fo:font-size="9.5pt" style:font-size-asian="9.5pt" style:font-size-complex="9.5pt"/>
    </style:style>
    <style:style style:name="P94" style:family="paragraph">
      <loext:graphic-properties draw:fill="solid" draw:fill-color="#dee6ef"/>
      <style:text-properties fo:color="#b4c7dc" loext:opacity="100%"/>
    </style:style>
    <style:style style:name="P95" style:family="paragraph">
      <loext:graphic-properties draw:fill="none"/>
      <style:paragraph-properties fo:text-align="center"/>
    </style:style>
    <style:style style:name="P96" style:family="paragraph">
      <loext:graphic-properties draw:fill="none"/>
      <style:paragraph-properties fo:text-align="center"/>
      <style:text-properties fo:color="#000233" loext:opacity="100%" fo:font-size="16pt" style:font-size-asian="16pt" style:font-size-complex="16pt"/>
    </style:style>
    <style:style style:name="P97" style:family="paragraph">
      <loext:graphic-properties draw:fill="none"/>
      <style:paragraph-properties fo:text-align="center"/>
      <style:text-properties fo:color="#008eff" loext:opacity="100%" fo:font-size="17pt" style:font-size-asian="17pt" style:font-size-complex="17pt"/>
    </style:style>
    <style:style style:name="P98" style:family="paragraph">
      <loext:graphic-properties draw:fill="none"/>
      <style:paragraph-properties fo:text-align="center"/>
      <style:text-properties fo:color="#004eff" loext:opacity="100%" fo:font-size="12pt" style:font-size-asian="12pt" style:font-size-complex="12pt"/>
    </style:style>
    <style:style style:name="P99" style:family="paragraph">
      <style:paragraph-properties fo:margin-top="0.42cm" fo:margin-bottom="0.35cm"/>
    </style:style>
    <style:style style:name="P100" style:family="paragraph">
      <loext:graphic-properties draw:fill="none" draw:fill-color="#ffffff"/>
      <style:paragraph-properties fo:margin-top="0.42cm" fo:margin-bottom="0.35cm"/>
      <style:text-properties fo:color="#004eff" loext:opacity="100%" fo:font-size="12pt" fo:font-weight="bold" style:font-size-asian="12pt" style:font-weight-asian="bold" style:font-size-complex="12pt" style:font-weight-complex="bold"/>
    </style:style>
    <style:style style:name="P101" style:family="paragraph">
      <loext:graphic-properties draw:fill="none" draw:fill-color="#ffffff"/>
      <style:paragraph-properties fo:margin-top="0.42cm" fo:margin-bottom="0.35cm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102" style:family="paragraph">
      <loext:graphic-properties draw:fill="none" draw:fill-color="#ffffff"/>
      <style:text-properties fo:color="#008eff" loext:opacity="100%" fo:font-size="10.5pt" style:text-underline-style="none" fo:font-weight="bold" style:font-size-asian="10.5pt" style:font-weight-asian="bold" style:font-size-complex="10.5pt" style:font-weight-complex="bold"/>
    </style:style>
    <style:style style:name="P103" style:family="paragraph">
      <loext:graphic-properties draw:fill="none" draw:fill-color="#ffffff"/>
      <style:text-properties fo:color="#ffffff" loext:opacity="100%" fo:font-size="13pt" fo:font-weight="bold" style:font-weight-asian="bold" style:font-weight-complex="bold"/>
    </style:style>
    <style:style style:name="P104" style:family="paragraph">
      <style:paragraph-properties fo:text-align="center"/>
    </style:style>
    <style:style style:name="P105" style:family="paragraph">
      <style:text-properties fo:font-size="18pt" style:font-size-asian="18pt" style:font-size-complex="18pt"/>
    </style:style>
    <style:style style:name="P106" style:family="paragraph">
      <loext:graphic-properties draw:fill="none" draw:fill-color="#ffffff"/>
      <style:text-properties fo:font-size="18pt" style:font-size-asian="18pt" style:font-size-complex="18pt"/>
    </style:style>
    <style:style style:name="P107" style:family="paragraph">
      <style:text-properties fo:font-size="14pt" style:font-size-asian="14pt" style:font-size-complex="14pt"/>
    </style:style>
    <style:style style:name="P108" style:family="paragraph">
      <loext:graphic-properties draw:fill="none" draw:fill-color="#ffffff"/>
      <style:text-properties fo:font-size="14pt" style:font-size-asian="14pt" style:font-size-complex="14pt"/>
    </style:style>
    <style:style style:name="P109" style:family="paragraph">
      <style:paragraph-properties fo:text-align="center"/>
      <style:text-properties fo:color="#ffffff" loext:opacity="100%" fo:font-size="13pt" style:font-size-asian="13pt" style:font-size-complex="13pt"/>
    </style:style>
    <style:style style:name="P110" style:family="paragraph">
      <loext:graphic-properties draw:fill="none" draw:fill-color="#ffffff"/>
      <style:paragraph-properties fo:text-align="center"/>
      <style:text-properties fo:color="#ffffff" loext:opacity="100%" fo:font-size="13pt" style:font-size-asian="13pt" style:font-size-complex="13pt"/>
    </style:style>
    <style:style style:name="T1" style:family="text">
      <style:text-properties fo:color="#29b6f6" loext:opacity="100%" style:font-name="Helvetica" fo:font-size="9pt" fo:font-weight="bold" style:font-name-asian="Helvetica" style:font-size-asian="9pt" style:font-weight-asian="bold" style:font-name-complex="Helvetica" style:font-size-complex="9pt" style:font-weight-complex="bold"/>
    </style:style>
    <style:style style:name="T2" style:family="text">
      <style:text-properties fo:color="#ffffff" loext:opacity="100%" style:font-name="Helvetica" fo:font-size="34pt" fo:font-weight="bold" style:font-name-asian="Helvetica" style:font-size-asian="34pt" style:font-weight-asian="bold" style:font-name-complex="Helvetica" style:font-size-complex="34pt" style:font-weight-complex="bold"/>
    </style:style>
    <style:style style:name="T3" style:family="text">
      <style:text-properties fo:color="#29b6f6" loext:opacity="100%" style:font-name="Helvetica" fo:font-size="34pt" fo:font-weight="bold" style:font-name-asian="Helvetica" style:font-size-asian="34pt" style:font-weight-asian="bold" style:font-name-complex="Helvetica" style:font-size-complex="34pt" style:font-weight-complex="bold"/>
    </style:style>
    <style:style style:name="T4" style:family="text">
      <style:text-properties fo:color="#b3e5fc" loext:opacity="100%" style:font-name="Helvetica" fo:font-size="11pt" fo:font-weight="normal" style:font-name-asian="Helvetica" style:font-size-asian="11pt" style:font-weight-asian="normal" style:font-name-complex="Helvetica" style:font-size-complex="11pt" style:font-weight-complex="normal"/>
    </style:style>
    <style:style style:name="T5" style:family="text">
      <style:text-properties fo:color="#29b6f6" loext:opacity="100%" style:font-name="ZapfDingbats" fo:font-size="11pt" fo:font-weight="normal" style:font-name-asian="ZapfDingbats" style:font-size-asian="11pt" style:font-weight-asian="normal" style:font-name-complex="ZapfDingbats" style:font-size-complex="11pt" style:font-weight-complex="normal"/>
    </style:style>
    <style:style style:name="T6" style:family="text">
      <style:text-properties fo:color="#29b6f6" loext:opacity="100%" style:font-name="Helvetic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T7" style:family="text">
      <style:text-properties fo:color="#546e7a" loext:opacity="100%" style:font-name="Helvetica" fo:font-size="7.5pt" fo:font-weight="normal" style:font-name-asian="Helvetica" style:font-size-asian="7.5pt" style:font-weight-asian="normal" style:font-name-complex="Helvetica" style:font-size-complex="7.5pt" style:font-weight-complex="normal"/>
    </style:style>
    <style:style style:name="T8" style:family="text">
      <style:text-properties fo:color="#29b6f6" loext:opacity="100%" style:font-name="Symbol" fo:font-size="11pt" fo:font-weight="normal" style:font-name-asian="Symbol" style:font-size-asian="11pt" style:font-weight-asian="normal" style:font-name-complex="Symbol" style:font-size-complex="11pt" style:font-weight-complex="normal"/>
    </style:style>
    <style:style style:name="T9" style:family="text">
      <style:text-properties fo:color="#0a2540" loext:opacity="100%" style:font-name="Helvetica" fo:font-size="15pt" fo:font-weight="bold" style:font-name-asian="Helvetica" style:font-size-asian="15pt" style:font-weight-asian="bold" style:font-name-complex="Helvetica" style:font-size-complex="15pt" style:font-weight-complex="bold"/>
    </style:style>
    <style:style style:name="T10" style:family="text">
      <style:text-properties fo:color="#546e7a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/>
    </style:style>
    <style:style style:name="T11" style:family="text">
      <style:text-properties fo:color="#1565c0" loext:opacity="100%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T12" style:family="text">
      <style:text-properties fo:color="#546e7a" loext:opacity="100%" style:font-name="Helvetica" fo:font-size="8.5pt" fo:font-weight="normal" style:font-name-asian="Helvetica" style:font-size-asian="8.5pt" style:font-weight-asian="normal" style:font-name-complex="Helvetica" style:font-size-complex="8.5pt" style:font-weight-complex="normal"/>
    </style:style>
    <style:style style:name="T13" style:family="text">
      <style:text-properties fo:color="#1565c0" loext:opacity="100%" style:font-name="Helvetica" fo:font-size="7pt" fo:font-weight="bold" style:font-name-asian="Helvetica" style:font-size-asian="7pt" style:font-weight-asian="bold" style:font-name-complex="Helvetica" style:font-size-complex="7pt" style:font-weight-complex="bold"/>
    </style:style>
    <style:style style:name="T14" style:family="text">
      <style:text-properties fo:color="#1565c0" loext:opacity="100%" style:font-name="Helvetic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T15" style:family="text">
      <style:text-properties fo:color="#1e88e5" loext:opacity="100%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T16" style:family="text">
      <style:text-properties fo:color="#1e88e5" loext:opacity="100%" style:font-name="Helvetic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T17" style:family="text">
      <style:text-properties fo:color="#0a2540" loext:opacity="100%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T18" style:family="text">
      <style:text-properties fo:color="#0a2540" loext:opacity="100%" style:font-name="Helvetic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T19" style:family="text">
      <style:text-properties fo:color="#0a2540" loext:opacity="100%" style:font-name="Helvetica" fo:font-size="13pt" fo:font-weight="bold" style:font-name-asian="Helvetica" style:font-size-asian="13pt" style:font-weight-asian="bold" style:font-name-complex="Helvetica" style:font-size-complex="13pt" style:font-weight-complex="bold"/>
    </style:style>
    <style:style style:name="T20" style:family="text">
      <style:text-properties fo:color="#ffffff" loext:opacity="100%" style:font-name="Helvetic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T21" style:family="text">
      <style:text-properties fo:color="#0a2540" loext:opacity="100%" style:font-name="Helvetica" fo:font-size="8.5pt" fo:font-weight="bold" style:font-name-asian="Helvetica" style:font-size-asian="8.5pt" style:font-weight-asian="bold" style:font-name-complex="Helvetica" style:font-size-complex="8.5pt" style:font-weight-complex="bold"/>
    </style:style>
    <style:style style:name="T22" style:family="text">
      <style:text-properties fo:color="#546e7a" loext:opacity="100%" style:font-name="Helvetica" fo:font-size="8pt" fo:font-weight="normal" style:font-name-asian="Helvetica" style:font-size-asian="8pt" style:font-weight-asian="normal" style:font-name-complex="Helvetica" style:font-size-complex="8pt" style:font-weight-complex="normal"/>
    </style:style>
    <style:style style:name="T23" style:family="text">
      <style:text-properties fo:color="#1565c0" loext:opacity="100%" style:font-name="Helvetica" fo:font-size="13pt" fo:font-weight="bold" style:font-name-asian="Helvetica" style:font-size-asian="13pt" style:font-weight-asian="bold" style:font-name-complex="Helvetica" style:font-size-complex="13pt" style:font-weight-complex="bold"/>
    </style:style>
    <style:style style:name="T24" style:family="text">
      <style:text-properties fo:color="#1e88e5" loext:opacity="100%" style:font-name="Helvetica" fo:font-size="13pt" fo:font-weight="bold" style:font-name-asian="Helvetica" style:font-size-asian="13pt" style:font-weight-asian="bold" style:font-name-complex="Helvetica" style:font-size-complex="13pt" style:font-weight-complex="bold"/>
    </style:style>
    <style:style style:name="T25" style:family="text">
      <style:text-properties fo:color="#ffffff" loext:opacity="100%" style:font-name="Helvetica" fo:font-size="6.5pt" fo:font-weight="normal" style:font-name-asian="Helvetica" style:font-size-asian="6.5pt" style:font-weight-asian="normal" style:font-name-complex="Helvetica" style:font-size-complex="6.5pt" style:font-weight-complex="normal"/>
    </style:style>
    <style:style style:name="T26" style:family="text">
      <style:text-properties fo:color="#ffffff" loext:opacity="100%" style:font-name="Helvetica" fo:font-size="17pt" fo:font-weight="bold" style:font-name-asian="Helvetica" style:font-size-asian="17pt" style:font-weight-asian="bold" style:font-name-complex="Helvetica" style:font-size-complex="17pt" style:font-weight-complex="bold"/>
    </style:style>
    <style:style style:name="T27" style:family="text">
      <style:text-properties fo:color="#29b6f6" loext:opacity="100%" style:font-name="Helvetica" fo:font-size="17pt" fo:font-weight="bold" style:font-name-asian="Helvetica" style:font-size-asian="17pt" style:font-weight-asian="bold" style:font-name-complex="Helvetica" style:font-size-complex="17pt" style:font-weight-complex="bold"/>
    </style:style>
    <style:style style:name="T28" style:family="text">
      <style:text-properties fo:color="#b3e5fc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/>
    </style:style>
    <style:style style:name="T29" style:family="text">
      <style:text-properties fo:color="#0a2540" loext:opacity="100%" style:font-name="Helvetica" fo:font-size="9.5pt" fo:font-weight="bold" style:font-name-asian="Helvetica" style:font-size-asian="9.5pt" style:font-weight-asian="bold" style:font-name-complex="Helvetica" style:font-size-complex="9.5pt" style:font-weight-complex="bold"/>
    </style:style>
    <style:style style:name="T30" style:family="text">
      <style:text-properties fo:color="#0a2540" loext:opacity="100%" style:font-name="Symbol" fo:font-size="9.5pt" fo:font-weight="normal" style:font-name-asian="Symbol" style:font-size-asian="9.5pt" style:font-weight-asian="normal" style:font-name-complex="Symbol" style:font-size-complex="9.5pt" style:font-weight-complex="normal"/>
    </style:style>
    <style:style style:name="T31" style:family="text">
      <style:text-properties fo:color="#90caf9" loext:opacity="100%" style:font-name="Helvetica" fo:font-size="7.5pt" fo:font-weight="normal" style:font-name-asian="Helvetica" style:font-size-asian="7.5pt" style:font-weight-asian="normal" style:font-name-complex="Helvetica" style:font-size-complex="7.5pt" style:font-weight-complex="normal"/>
    </style:style>
    <style:style style:name="T32" style:family="text">
      <style:text-properties fo:color="#90caf9" loext:opacity="100%" style:font-name="Helvetica" fo:font-size="8pt" fo:font-weight="bold" style:font-name-asian="Helvetica" style:font-size-asian="8pt" style:font-weight-asian="bold" style:font-name-complex="Helvetica" style:font-size-complex="8pt" style:font-weight-complex="bold"/>
    </style:style>
    <style:style style:name="T33" style:family="text">
      <style:text-properties fo:color="#000233" loext:opacity="100%" style:font-name="Helvetica" fo:font-size="16pt" fo:font-weight="bold" style:font-name-asian="Helvetica" style:font-size-asian="16pt" style:font-weight-asian="bold" style:font-name-complex="Helvetica" style:font-size-complex="16pt" style:font-weight-complex="bold"/>
    </style:style>
    <style:style style:name="T34" style:family="text">
      <style:text-properties fo:color="#008eff" loext:opacity="100%" style:font-name="Helvetica" fo:font-size="17pt" fo:font-weight="bold" style:font-name-asian="Helvetica" style:font-size-asian="17pt" style:font-weight-asian="bold" style:font-name-complex="Helvetica" style:font-size-complex="17pt" style:font-weight-complex="bold"/>
    </style:style>
    <style:style style:name="T35" style:family="text">
      <style:text-properties fo:color="#004eff" loext:opacity="100%" style:font-name="Helvetica" fo:font-size="14pt" fo:font-weight="bold" style:font-name-asian="Helvetica" style:font-size-asian="14pt" style:font-weight-asian="bold" style:font-name-complex="Helvetica" style:font-size-complex="14pt" style:font-weight-complex="bold"/>
    </style:style>
    <style:style style:name="T36" style:family="text">
      <style:text-properties fo:color="#004eff" loext:opacity="100%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T37" style:family="text">
      <style:text-properties fo:color="#004eff" loext:opacity="100%" fo:font-size="12pt" fo:font-weight="bold" style:font-size-asian="12pt" style:font-weight-asian="bold" style:font-size-complex="12pt" style:font-weight-complex="bold"/>
    </style:style>
    <style:style style:name="T38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9" style:family="text">
      <style:text-properties fo:color="#008eff" loext:opacity="100%" fo:font-size="16pt" style:text-underline-style="none" fo:font-weight="bold" style:font-size-asian="16pt" style:font-weight-asian="bold" style:font-size-complex="16pt" style:font-weight-complex="bold"/>
    </style:style>
    <style:style style:name="T40" style:family="text">
      <style:text-properties fo:color="#ffffff" loext:opacity="100%" fo:font-size="13pt" fo:font-weight="bold" style:font-weight-asian="bold" style:font-weight-complex="bold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color="#ffffff" loext:opacity="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0.165cm" svg:x="0cm" svg:y="7.596cm" svg:viewBox="0 0 21001 166" draw:points="0,166 21001,166 21001,0 0,0">
          <text:p/>
        </draw:polygon>
        <draw:polygon draw:style-name="gr2" draw:text-style-name="P2" draw:layer="layout" svg:width="21cm" svg:height="0.164cm" svg:x="0cm" svg:y="7.467cm" svg:viewBox="0 0 21001 165" draw:points="0,165 21001,165 21001,0 0,0">
          <text:p/>
        </draw:polygon>
        <draw:polygon draw:style-name="gr3" draw:text-style-name="P3" draw:layer="layout" svg:width="21cm" svg:height="0.165cm" svg:x="0cm" svg:y="7.337cm" svg:viewBox="0 0 21001 166" draw:points="0,166 21001,166 21001,0 0,0">
          <text:p/>
        </draw:polygon>
        <draw:polygon draw:style-name="gr4" draw:text-style-name="P4" draw:layer="layout" svg:width="21cm" svg:height="0.165cm" svg:x="0cm" svg:y="7.208cm" svg:viewBox="0 0 21001 166" draw:points="0,166 21001,166 21001,0 0,0">
          <text:p/>
        </draw:polygon>
        <draw:polygon draw:style-name="gr5" draw:text-style-name="P5" draw:layer="layout" svg:width="21cm" svg:height="0.164cm" svg:x="0cm" svg:y="7.079cm" svg:viewBox="0 0 21001 165" draw:points="0,165 21001,165 21001,0 0,0">
          <text:p/>
        </draw:polygon>
        <draw:polygon draw:style-name="gr6" draw:text-style-name="P6" draw:layer="layout" svg:width="21cm" svg:height="0.165cm" svg:x="0cm" svg:y="6.949cm" svg:viewBox="0 0 21001 166" draw:points="0,166 21001,166 21001,0 0,0">
          <text:p/>
        </draw:polygon>
        <draw:polygon draw:style-name="gr7" draw:text-style-name="P7" draw:layer="layout" svg:width="21cm" svg:height="0.164cm" svg:x="0cm" svg:y="6.82cm" svg:viewBox="0 0 21001 165" draw:points="0,165 21001,165 21001,0 0,0">
          <text:p/>
        </draw:polygon>
        <draw:polygon draw:style-name="gr8" draw:text-style-name="P8" draw:layer="layout" svg:width="21cm" svg:height="0.164cm" svg:x="0cm" svg:y="6.691cm" svg:viewBox="0 0 21001 165" draw:points="0,165 21001,165 21001,0 0,0">
          <text:p/>
        </draw:polygon>
        <draw:polygon draw:style-name="gr9" draw:text-style-name="P9" draw:layer="layout" svg:width="21cm" svg:height="0.165cm" svg:x="0cm" svg:y="6.561cm" svg:viewBox="0 0 21001 166" draw:points="0,166 21001,166 21001,0 0,0">
          <text:p/>
        </draw:polygon>
        <draw:polygon draw:style-name="gr10" draw:text-style-name="P10" draw:layer="layout" svg:width="21cm" svg:height="0.164cm" svg:x="0cm" svg:y="6.432cm" svg:viewBox="0 0 21001 165" draw:points="0,165 21001,165 21001,0 0,0">
          <text:p/>
        </draw:polygon>
        <draw:polygon draw:style-name="gr11" draw:text-style-name="P11" draw:layer="layout" svg:width="21cm" svg:height="0.165cm" svg:x="0cm" svg:y="6.302cm" svg:viewBox="0 0 21001 166" draw:points="0,166 21001,166 21001,0 0,0">
          <text:p/>
        </draw:polygon>
        <draw:polygon draw:style-name="gr12" draw:text-style-name="P12" draw:layer="layout" svg:width="21cm" svg:height="0.165cm" svg:x="0cm" svg:y="6.173cm" svg:viewBox="0 0 21001 166" draw:points="0,166 21001,166 21001,0 0,0">
          <text:p/>
        </draw:polygon>
        <draw:polygon draw:style-name="gr13" draw:text-style-name="P13" draw:layer="layout" svg:width="21cm" svg:height="0.164cm" svg:x="0cm" svg:y="6.044cm" svg:viewBox="0 0 21001 165" draw:points="0,165 21001,165 21001,0 0,0">
          <text:p/>
        </draw:polygon>
        <draw:polygon draw:style-name="gr14" draw:text-style-name="P14" draw:layer="layout" svg:width="21cm" svg:height="0.165cm" svg:x="0cm" svg:y="5.914cm" svg:viewBox="0 0 21001 166" draw:points="0,166 21001,166 21001,0 0,0">
          <text:p/>
        </draw:polygon>
        <draw:polygon draw:style-name="gr15" draw:text-style-name="P15" draw:layer="layout" svg:width="21cm" svg:height="0.165cm" svg:x="0cm" svg:y="5.785cm" svg:viewBox="0 0 21001 166" draw:points="0,166 21001,166 21001,0 0,0">
          <text:p/>
        </draw:polygon>
        <draw:polygon draw:style-name="gr16" draw:text-style-name="P16" draw:layer="layout" svg:width="21cm" svg:height="0.164cm" svg:x="0cm" svg:y="5.656cm" svg:viewBox="0 0 21001 165" draw:points="0,165 21001,165 21001,0 0,0">
          <text:p/>
        </draw:polygon>
        <draw:polygon draw:style-name="gr17" draw:text-style-name="P17" draw:layer="layout" svg:width="21cm" svg:height="0.165cm" svg:x="0cm" svg:y="5.526cm" svg:viewBox="0 0 21001 166" draw:points="0,166 21001,166 21001,0 0,0">
          <text:p/>
        </draw:polygon>
        <draw:polygon draw:style-name="gr18" draw:text-style-name="P18" draw:layer="layout" svg:width="21cm" svg:height="0.165cm" svg:x="0cm" svg:y="5.397cm" svg:viewBox="0 0 21001 166" draw:points="0,166 21001,166 21001,0 0,0">
          <text:p/>
        </draw:polygon>
        <draw:polygon draw:style-name="gr19" draw:text-style-name="P19" draw:layer="layout" svg:width="21cm" svg:height="0.164cm" svg:x="0cm" svg:y="5.268cm" svg:viewBox="0 0 21001 165" draw:points="0,165 21001,165 21001,0 0,0">
          <text:p/>
        </draw:polygon>
        <draw:polygon draw:style-name="gr20" draw:text-style-name="P20" draw:layer="layout" svg:width="21cm" svg:height="0.165cm" svg:x="0cm" svg:y="5.138cm" svg:viewBox="0 0 21001 166" draw:points="0,166 21001,166 21001,0 0,0">
          <text:p/>
        </draw:polygon>
        <draw:polygon draw:style-name="gr21" draw:text-style-name="P21" draw:layer="layout" svg:width="21cm" svg:height="0.165cm" svg:x="0cm" svg:y="5.009cm" svg:viewBox="0 0 21001 166" draw:points="0,166 21001,166 21001,0 0,0">
          <text:p/>
        </draw:polygon>
        <draw:polygon draw:style-name="gr22" draw:text-style-name="P22" draw:layer="layout" svg:width="21cm" svg:height="0.164cm" svg:x="0cm" svg:y="4.88cm" svg:viewBox="0 0 21001 165" draw:points="0,165 21001,165 21001,0 0,0">
          <text:p/>
        </draw:polygon>
        <draw:polygon draw:style-name="gr23" draw:text-style-name="P23" draw:layer="layout" svg:width="21cm" svg:height="0.165cm" svg:x="0cm" svg:y="4.75cm" svg:viewBox="0 0 21001 166" draw:points="0,166 21001,166 21001,0 0,0">
          <text:p/>
        </draw:polygon>
        <draw:polygon draw:style-name="gr24" draw:text-style-name="P24" draw:layer="layout" svg:width="21cm" svg:height="0.165cm" svg:x="0cm" svg:y="4.621cm" svg:viewBox="0 0 21001 166" draw:points="0,166 21001,166 21001,0 0,0">
          <text:p/>
        </draw:polygon>
        <draw:polygon draw:style-name="gr25" draw:text-style-name="P25" draw:layer="layout" svg:width="21cm" svg:height="0.164cm" svg:x="0cm" svg:y="4.492cm" svg:viewBox="0 0 21001 165" draw:points="0,165 21001,165 21001,0 0,0">
          <text:p/>
        </draw:polygon>
        <draw:polygon draw:style-name="gr26" draw:text-style-name="P26" draw:layer="layout" svg:width="21cm" svg:height="0.165cm" svg:x="0cm" svg:y="4.362cm" svg:viewBox="0 0 21001 166" draw:points="0,166 21001,166 21001,0 0,0">
          <text:p/>
        </draw:polygon>
        <draw:polygon draw:style-name="gr27" draw:text-style-name="P27" draw:layer="layout" svg:width="21cm" svg:height="0.164cm" svg:x="0cm" svg:y="4.233cm" svg:viewBox="0 0 21001 165" draw:points="0,165 21001,165 21001,0 0,0">
          <text:p/>
        </draw:polygon>
        <draw:polygon draw:style-name="gr28" draw:text-style-name="P28" draw:layer="layout" svg:width="21cm" svg:height="0.165cm" svg:x="0cm" svg:y="4.103cm" svg:viewBox="0 0 21001 166" draw:points="0,166 21001,166 21001,0 0,0">
          <text:p/>
        </draw:polygon>
        <draw:polygon draw:style-name="gr29" draw:text-style-name="P29" draw:layer="layout" svg:width="21cm" svg:height="0.165cm" svg:x="0cm" svg:y="3.974cm" svg:viewBox="0 0 21001 166" draw:points="0,166 21001,166 21001,0 0,0">
          <text:p/>
        </draw:polygon>
        <draw:polygon draw:style-name="gr30" draw:text-style-name="P30" draw:layer="layout" svg:width="21cm" svg:height="0.164cm" svg:x="0cm" svg:y="3.845cm" svg:viewBox="0 0 21001 165" draw:points="0,165 21001,165 21001,0 0,0">
          <text:p/>
        </draw:polygon>
        <draw:polygon draw:style-name="gr31" draw:text-style-name="P31" draw:layer="layout" svg:width="21cm" svg:height="0.165cm" svg:x="0cm" svg:y="3.715cm" svg:viewBox="0 0 21001 166" draw:points="0,166 21001,166 21001,0 0,0">
          <text:p/>
        </draw:polygon>
        <draw:polygon draw:style-name="gr32" draw:text-style-name="P32" draw:layer="layout" svg:width="21cm" svg:height="0.165cm" svg:x="0cm" svg:y="3.586cm" svg:viewBox="0 0 21001 166" draw:points="0,166 21001,166 21001,0 0,0">
          <text:p/>
        </draw:polygon>
        <draw:polygon draw:style-name="gr33" draw:text-style-name="P33" draw:layer="layout" svg:width="21cm" svg:height="0.164cm" svg:x="0cm" svg:y="3.457cm" svg:viewBox="0 0 21001 165" draw:points="0,165 21001,165 21001,0 0,0">
          <text:p/>
        </draw:polygon>
        <draw:polygon draw:style-name="gr34" draw:text-style-name="P34" draw:layer="layout" svg:width="21cm" svg:height="0.165cm" svg:x="0cm" svg:y="3.327cm" svg:viewBox="0 0 21001 166" draw:points="0,166 21001,166 21001,0 0,0">
          <text:p/>
        </draw:polygon>
        <draw:polygon draw:style-name="gr35" draw:text-style-name="P35" draw:layer="layout" svg:width="21cm" svg:height="0.165cm" svg:x="0cm" svg:y="3.198cm" svg:viewBox="0 0 21001 166" draw:points="0,166 21001,166 21001,0 0,0">
          <text:p/>
        </draw:polygon>
        <draw:polygon draw:style-name="gr36" draw:text-style-name="P36" draw:layer="layout" svg:width="21cm" svg:height="0.164cm" svg:x="0cm" svg:y="3.069cm" svg:viewBox="0 0 21001 165" draw:points="0,165 21001,165 21001,0 0,0">
          <text:p/>
        </draw:polygon>
        <draw:polygon draw:style-name="gr37" draw:text-style-name="P37" draw:layer="layout" svg:width="21cm" svg:height="0.165cm" svg:x="0cm" svg:y="2.939cm" svg:viewBox="0 0 21001 166" draw:points="0,166 21001,166 21001,0 0,0">
          <text:p/>
        </draw:polygon>
        <draw:polygon draw:style-name="gr38" draw:text-style-name="P38" draw:layer="layout" svg:width="21cm" svg:height="0.165cm" svg:x="0cm" svg:y="2.81cm" svg:viewBox="0 0 21001 166" draw:points="0,166 21001,166 21001,0 0,0">
          <text:p/>
        </draw:polygon>
        <draw:polygon draw:style-name="gr39" draw:text-style-name="P39" draw:layer="layout" svg:width="21cm" svg:height="0.164cm" svg:x="0cm" svg:y="2.681cm" svg:viewBox="0 0 21001 165" draw:points="0,165 21001,165 21001,0 0,0">
          <text:p/>
        </draw:polygon>
        <draw:polygon draw:style-name="gr40" draw:text-style-name="P40" draw:layer="layout" svg:width="21cm" svg:height="0.165cm" svg:x="0cm" svg:y="2.551cm" svg:viewBox="0 0 21001 166" draw:points="0,166 21001,166 21001,0 0,0">
          <text:p/>
        </draw:polygon>
        <draw:polygon draw:style-name="gr41" draw:text-style-name="P41" draw:layer="layout" svg:width="21cm" svg:height="0.165cm" svg:x="0cm" svg:y="2.422cm" svg:viewBox="0 0 21001 166" draw:points="0,166 21001,166 21001,0 0,0">
          <text:p/>
        </draw:polygon>
        <draw:polygon draw:style-name="gr42" draw:text-style-name="P42" draw:layer="layout" svg:width="21cm" svg:height="0.164cm" svg:x="0cm" svg:y="2.293cm" svg:viewBox="0 0 21001 165" draw:points="0,165 21001,165 21001,0 0,0">
          <text:p/>
        </draw:polygon>
        <draw:polygon draw:style-name="gr43" draw:text-style-name="P43" draw:layer="layout" svg:width="21cm" svg:height="0.165cm" svg:x="0cm" svg:y="2.163cm" svg:viewBox="0 0 21001 166" draw:points="0,166 21001,166 21001,0 0,0">
          <text:p/>
        </draw:polygon>
        <draw:polygon draw:style-name="gr44" draw:text-style-name="P44" draw:layer="layout" svg:width="21cm" svg:height="0.164cm" svg:x="0cm" svg:y="2.034cm" svg:viewBox="0 0 21001 165" draw:points="0,165 21001,165 21001,0 0,0">
          <text:p/>
        </draw:polygon>
        <draw:polygon draw:style-name="gr45" draw:text-style-name="P45" draw:layer="layout" svg:width="21cm" svg:height="0.164cm" svg:x="0cm" svg:y="1.905cm" svg:viewBox="0 0 21001 165" draw:points="0,165 21001,165 21001,0 0,0">
          <text:p/>
        </draw:polygon>
        <draw:polygon draw:style-name="gr46" draw:text-style-name="P46" draw:layer="layout" svg:width="21cm" svg:height="0.165cm" svg:x="0cm" svg:y="1.775cm" svg:viewBox="0 0 21001 166" draw:points="0,166 21001,166 21001,0 0,0">
          <text:p/>
        </draw:polygon>
        <draw:polygon draw:style-name="gr47" draw:text-style-name="P47" draw:layer="layout" svg:width="21cm" svg:height="0.164cm" svg:x="0cm" svg:y="1.646cm" svg:viewBox="0 0 21001 165" draw:points="0,165 21001,165 21001,0 0,0">
          <text:p/>
        </draw:polygon>
        <draw:polygon draw:style-name="gr48" draw:text-style-name="P48" draw:layer="layout" svg:width="21cm" svg:height="0.165cm" svg:x="0cm" svg:y="1.516cm" svg:viewBox="0 0 21001 166" draw:points="0,166 21001,166 21001,0 0,0">
          <text:p/>
        </draw:polygon>
        <draw:polygon draw:style-name="gr49" draw:text-style-name="P49" draw:layer="layout" svg:width="21cm" svg:height="0.165cm" svg:x="0cm" svg:y="1.387cm" svg:viewBox="0 0 21001 166" draw:points="0,166 21001,166 21001,0 0,0">
          <text:p/>
        </draw:polygon>
        <draw:polygon draw:style-name="gr50" draw:text-style-name="P50" draw:layer="layout" svg:width="21cm" svg:height="0.164cm" svg:x="0cm" svg:y="1.258cm" svg:viewBox="0 0 21001 165" draw:points="0,165 21001,165 21001,0 0,0">
          <text:p/>
        </draw:polygon>
        <draw:polygon draw:style-name="gr51" draw:text-style-name="P51" draw:layer="layout" svg:width="21cm" svg:height="0.165cm" svg:x="0cm" svg:y="1.128cm" svg:viewBox="0 0 21001 166" draw:points="0,166 21001,166 21001,0 0,0">
          <text:p/>
        </draw:polygon>
        <draw:polygon draw:style-name="gr52" draw:text-style-name="P52" draw:layer="layout" svg:width="21cm" svg:height="0.165cm" svg:x="0cm" svg:y="0.999cm" svg:viewBox="0 0 21001 166" draw:points="0,166 21001,166 21001,0 0,0">
          <text:p/>
        </draw:polygon>
        <draw:polygon draw:style-name="gr53" draw:text-style-name="P53" draw:layer="layout" svg:width="21cm" svg:height="0.164cm" svg:x="0cm" svg:y="0.87cm" svg:viewBox="0 0 21001 165" draw:points="0,165 21001,165 21001,0 0,0">
          <text:p/>
        </draw:polygon>
        <draw:polygon draw:style-name="gr54" draw:text-style-name="P54" draw:layer="layout" svg:width="21cm" svg:height="0.165cm" svg:x="0cm" svg:y="0.74cm" svg:viewBox="0 0 21001 166" draw:points="0,166 21001,166 21001,0 0,0">
          <text:p/>
        </draw:polygon>
        <draw:polygon draw:style-name="gr55" draw:text-style-name="P55" draw:layer="layout" svg:width="21cm" svg:height="0.165cm" svg:x="0cm" svg:y="0.611cm" svg:viewBox="0 0 21001 166" draw:points="0,166 21001,166 21001,0 0,0">
          <text:p/>
        </draw:polygon>
        <draw:polygon draw:style-name="gr56" draw:text-style-name="P56" draw:layer="layout" svg:width="21cm" svg:height="0.164cm" svg:x="0cm" svg:y="0.482cm" svg:viewBox="0 0 21001 165" draw:points="0,165 21001,165 21001,0 0,0">
          <text:p/>
        </draw:polygon>
        <draw:polygon draw:style-name="gr57" draw:text-style-name="P57" draw:layer="layout" svg:width="21cm" svg:height="0.165cm" svg:x="0cm" svg:y="0.352cm" svg:viewBox="0 0 21001 166" draw:points="0,166 21001,166 21001,0 0,0">
          <text:p/>
        </draw:polygon>
        <draw:polygon draw:style-name="gr58" draw:text-style-name="P58" draw:layer="layout" svg:width="21cm" svg:height="0.165cm" svg:x="0cm" svg:y="0.223cm" svg:viewBox="0 0 21001 166" draw:points="0,166 21001,166 21001,0 0,0">
          <text:p/>
        </draw:polygon>
        <draw:polygon draw:style-name="gr59" draw:text-style-name="P59" draw:layer="layout" svg:width="21cm" svg:height="0.164cm" svg:x="0cm" svg:y="0.094cm" svg:viewBox="0 0 21001 165" draw:points="0,165 21001,165 21001,0 0,0">
          <text:p/>
        </draw:polygon>
        <draw:polygon draw:style-name="gr60" draw:text-style-name="P60" draw:layer="layout" svg:width="21cm" svg:height="0.165cm" svg:x="0cm" svg:y="-0.036cm" svg:viewBox="0 0 21001 166" draw:points="0,166 21001,166 21001,0 0,0">
          <text:p/>
        </draw:polygon>
        <draw:path draw:style-name="gr61" draw:text-style-name="P61" draw:layer="layout" svg:width="4.939cm" svg:height="4.939cm" svg:x="-0.706cm" svg:y="-1.412cm" svg:viewBox="0 0 4940 4940" svg:d="M4940 2470c0-1364-1106-2470-2471-2470-1363 0-2469 1106-2469 2470s1106 2470 2469 2470c1365 0 2471-1106 2471-2470z">
          <text:p/>
        </draw:path>
        <draw:path draw:style-name="gr62" draw:text-style-name="P62" draw:layer="layout" svg:width="6.35cm" svg:height="6.35cm" svg:x="16.413cm" svg:y="3.174cm" svg:viewBox="0 0 6351 6351" svg:d="M6351 3176c0-1753-1422-3176-3176-3176-1753 0-3175 1423-3175 3176 0 1754 1422 3175 3175 3175 1754 0 3176-1421 3176-3175z">
          <text:p/>
        </draw:path>
        <draw:path draw:style-name="gr63" draw:text-style-name="P63" draw:layer="layout" svg:width="2.822cm" svg:height="2.822cm" svg:x="16.061cm" svg:y="-0.353cm" svg:viewBox="0 0 2823 2823" svg:d="M2823 1411c0-780-633-1411-1412-1411-780 0-1411 631-1411 1411s631 1412 1411 1412c779 0 1412-632 1412-1412z">
          <text:p/>
        </draw:path>
        <draw:path draw:style-name="gr64" draw:text-style-name="P64" draw:layer="layout" svg:width="3.423cm" svg:height="0.564cm" svg:x="8.788cm" svg:y="0.776cm" svg:viewBox="0 0 3424 565" svg:d="M212 565h3000c117 0 212-95 212-212v-141c0-117-95-212-212-212h-3000c-117 0-212 95-212 212v141c0 117 95 212 212 212z">
          <text:p/>
        </draw:path>
        <draw:frame draw:style-name="gr65" draw:text-style-name="P66" draw:layer="layout" svg:width="3.139cm" svg:height="0.319cm" svg:x="8.93cm" svg:y="0.968cm">
          <draw:text-box>
            <text:p text:style-name="P65"><text:span text:style-name="T1"><text:s text:c="2"/></text:span><text:span text:style-name="T1">PROJECT STUDIO <text:s/></text:span></text:p>
          </draw:text-box>
        </draw:frame>
        <draw:frame draw:style-name="gr66" draw:text-style-name="P67" draw:layer="layout" svg:width="11.648cm" svg:height="1.199cm" svg:x="4.668cm" svg:y="1.666cm">
          <draw:text-box>
            <text:p text:style-name="P65"><text:span text:style-name="T2">Turn </text:span><text:span text:style-name="T2">Your </text:span><text:span text:style-name="T2">Ideas </text:span><text:span text:style-name="T2">Into</text:span></text:p>
          </draw:text-box>
        </draw:frame>
        <draw:frame draw:style-name="gr67" draw:text-style-name="P67" draw:layer="layout" svg:width="13.049cm" svg:height="1.199cm" svg:x="3.968cm" svg:y="2.794cm">
          <draw:text-box>
            <text:p text:style-name="P65"><text:span text:style-name="T3">R</text:span><text:span text:style-name="T3">ea</text:span><text:span text:style-name="T3">l, </text:span><text:span text:style-name="T3">W</text:span><text:span text:style-name="T3">or</text:span><text:span text:style-name="T3">ki</text:span><text:span text:style-name="T3">n</text:span><text:span text:style-name="T3">g </text:span><text:span text:style-name="T3">Pr</text:span><text:span text:style-name="T3">oj</text:span><text:span text:style-name="T3">ec</text:span><text:span text:style-name="T3">ts</text:span></text:p>
          </draw:text-box>
        </draw:frame>
        <draw:path draw:style-name="gr68" draw:text-style-name="P68" draw:layer="layout" svg:width="6.349cm" svg:height="0.951cm" svg:x="4.127cm" svg:y="5.397cm" svg:viewBox="0 0 6350 952" svg:d="M635 952h5080c350 0 635-214 635-476 0-263-285-476-635-476h-5080c-351 0-635 213-635 476 0 262 284 476 635 476z">
          <text:p/>
        </draw:path>
        <draw:frame draw:style-name="gr69" draw:text-style-name="P69" draw:layer="layout" svg:width="9.404cm" svg:height="0.391cm" svg:x="5.814cm" svg:y="4.064cm">
          <draw:text-box>
            <text:p text:style-name="P65"><text:span text:style-name="T4">CSE </text:span><text:span text:style-name="T4">Projects <text:s/>• <text:s/></text:span><text:span text:style-name="T4">Creative </text:span><text:span text:style-name="T4">Works <text:s/>• <text:s/></text:span><text:span text:style-name="T4">Business </text:span><text:span text:style-name="T4">Websites</text:span></text:p>
          </draw:text-box>
        </draw:frame>
        <draw:frame draw:style-name="gr70" draw:text-style-name="P69" draw:layer="layout" svg:width="0.349cm" svg:height="0.549cm" svg:x="1.948cm" svg:y="7.937cm">
          <draw:text-box>
            <text:p text:style-name="P65"><text:span text:style-name="T5">★</text:span></text:p>
          </draw:text-box>
        </draw:frame>
        <draw:frame draw:style-name="gr71" draw:text-style-name="P69" draw:layer="layout" svg:width="0.646cm" svg:height="0.459cm" svg:x="2.177cm" svg:y="8.05cm">
          <draw:text-box>
            <text:p text:style-name="P65"><text:span text:style-name="T6"><text:s/></text:span><text:span text:style-name="T6">4.9</text:span></text:p>
          </draw:text-box>
        </draw:frame>
        <draw:frame draw:style-name="gr72" draw:text-style-name="P70" draw:layer="layout" svg:width="1.704cm" svg:height="0.315cm" svg:x="1.684cm" svg:y="8.535cm">
          <draw:text-box>
            <text:p text:style-name="P65"><text:span text:style-name="T7">Stud</text:span><text:span text:style-name="T7">ent </text:span><text:span text:style-name="T7">Rate</text:span><text:span text:style-name="T7">d</text:span></text:p>
          </draw:text-box>
        </draw:frame>
        <draw:frame draw:style-name="gr73" draw:text-style-name="P69" draw:layer="layout" svg:width="0.328cm" svg:height="0.549cm" svg:x="5.99cm" svg:y="7.937cm">
          <draw:text-box>
            <text:p text:style-name="P65"><text:span text:style-name="T5">✓</text:span></text:p>
          </draw:text-box>
        </draw:frame>
        <draw:frame draw:style-name="gr74" draw:text-style-name="P70" draw:layer="layout" svg:width="1.721cm" svg:height="0.315cm" svg:x="5.478cm" svg:y="8.535cm">
          <draw:text-box>
            <text:p text:style-name="P65"><text:span text:style-name="T7">Quick Delivery</text:span></text:p>
          </draw:text-box>
        </draw:frame>
        <draw:frame draw:style-name="gr75" draw:text-style-name="P69" draw:layer="layout" svg:width="0.37cm" svg:height="0.549cm" svg:x="9.787cm" svg:y="7.937cm">
          <draw:text-box>
            <text:p text:style-name="P65"><text:span text:style-name="T5">■</text:span></text:p>
          </draw:text-box>
        </draw:frame>
        <draw:frame draw:style-name="gr76" draw:text-style-name="P70" draw:layer="layout" svg:width="1.78cm" svg:height="0.315cm" svg:x="9.256cm" svg:y="8.535cm">
          <draw:text-box>
            <text:p text:style-name="P65"><text:span text:style-name="T7">Free Revisions</text:span></text:p>
          </draw:text-box>
        </draw:frame>
        <draw:frame draw:style-name="gr77" draw:text-style-name="P69" draw:layer="layout" svg:width="0.489cm" svg:height="0.46cm" svg:x="13.588cm" svg:y="8.032cm">
          <draw:text-box>
            <text:p text:style-name="P65"><text:span text:style-name="T8">♦</text:span></text:p>
          </draw:text-box>
        </draw:frame>
        <draw:line draw:style-name="gr78" draw:text-style-name="P71" draw:layer="layout" svg:x1="1.058cm" svg:y1="8.89cm" svg:x2="17.462cm" svg:y2="8.89cm">
          <text:p/>
        </draw:line>
        <draw:frame draw:style-name="gr79" draw:text-style-name="P70" draw:layer="layout" svg:width="1.407cm" svg:height="0.315cm" svg:x="13.187cm" svg:y="8.535cm">
          <draw:text-box>
            <text:p text:style-name="P65"><text:span text:style-name="T7">Cl</text:span><text:span text:style-name="T7">ea</text:span><text:span text:style-name="T7">n </text:span><text:span text:style-name="T7">Co</text:span><text:span text:style-name="T7">de</text:span></text:p>
          </draw:text-box>
        </draw:frame>
        <draw:frame draw:style-name="gr80" draw:text-style-name="P72" draw:layer="layout" svg:width="5.323cm" svg:height="0.53cm" svg:x="7.839cm" svg:y="9.21cm">
          <draw:text-box>
            <text:p text:style-name="P65"><text:span text:style-name="T9">Choose Your Service</text:span></text:p>
          </draw:text-box>
        </draw:frame>
        <draw:path draw:style-name="gr81" draw:text-style-name="P73" draw:layer="layout" svg:width="6.341cm" svg:height="5.221cm" svg:x="0.564cm" svg:y="10.653cm" svg:viewBox="0 0 6342 5222" svg:d="M423 5222h5496c234 0 423-189 423-423v-4375c0-234-189-424-423-424h-5496c-234 0-423 190-423 424v4375c0 234 189 423 423 423z">
          <text:p/>
        </draw:path>
        <draw:path draw:style-name="gr82" draw:text-style-name="P74" draw:layer="layout" svg:width="6.342cm" svg:height="5.221cm" svg:x="0.493cm" svg:y="10.583cm" svg:viewBox="0 0 6343 5222" svg:d="M424 5222h5496c233 0 423-190 423-423v-4376c0-234-190-423-423-423h-5496c-234 0-424 189-424 423v4376c0 233 190 423 424 423z">
          <text:p/>
        </draw:path>
        <draw:path draw:style-name="gr83" draw:text-style-name="P75" draw:layer="layout" svg:width="6.342cm" svg:height="0.988cm" svg:x="0.493cm" svg:y="10.583cm" svg:viewBox="0 0 6343 989" svg:d="M424 989h5496c233 0 423-190 423-425v-141c0-234-190-423-423-423h-5496c-234 0-424 189-424 423v141c0 235 190 425 424 425z">
          <text:p/>
        </draw:path>
        <draw:polygon draw:style-name="gr83" draw:text-style-name="P75" draw:layer="layout" svg:width="6.342cm" svg:height="0.494cm" svg:x="0.493cm" svg:y="11.077cm" svg:viewBox="0 0 6343 495" draw:points="0,495 6343,495 6343,0 0,0">
          <text:p/>
        </draw:polygon>
        <draw:frame draw:style-name="gr84" draw:text-style-name="P66" draw:layer="layout" svg:width="6.28cm" svg:height="0.319cm" svg:x="7.359cm" svg:y="9.858cm">
          <draw:text-box>
            <text:p text:style-name="P65"><text:span text:style-name="T10">Three focused services, one simple process.</text:span></text:p>
          </draw:text-box>
        </draw:frame>
        <draw:frame draw:style-name="gr85" draw:text-style-name="P76" draw:layer="layout" svg:width="2.661cm" svg:height="0.424cm" svg:x="2.335cm" svg:y="11.827cm">
          <draw:text-box>
            <text:p text:style-name="P65"><text:span text:style-name="T11">CSE Projects</text:span></text:p>
          </draw:text-box>
        </draw:frame>
        <draw:frame draw:style-name="gr86" draw:text-style-name="P77" draw:layer="layout" svg:width="3.042cm" svg:height="0.302cm" svg:x="2.148cm" svg:y="12.481cm">
          <draw:text-box>
            <text:p text:style-name="P65"><text:span text:style-name="T12">Diploma &amp; engineering</text:span></text:p>
          </draw:text-box>
        </draw:frame>
        <draw:path draw:style-name="gr87" draw:text-style-name="P78" draw:layer="layout" svg:width="1.096cm" svg:height="0.494cm" svg:x="1.705cm" svg:y="13.264cm" svg:viewBox="0 0 1097 495" svg:d="M176 495h743c98 0 178-79 178-177v-142c0-97-80-176-178-176h-743c-97 0-176 79-176 176v142c0 98 79 177 176 177z">
          <text:p/>
        </draw:path>
        <draw:frame draw:style-name="gr88" draw:text-style-name="P77" draw:layer="layout" svg:width="2.106cm" svg:height="0.302cm" svg:x="2.615cm" svg:y="12.905cm">
          <draw:text-box>
            <text:p text:style-name="P65"><text:span text:style-name="T12">final-year builds</text:span></text:p>
          </draw:text-box>
        </draw:frame>
        <draw:path draw:style-name="gr87" draw:text-style-name="P78" draw:layer="layout" svg:width="1.055cm" svg:height="0.494cm" svg:x="2.942cm" svg:y="13.264cm" svg:viewBox="0 0 1056 495" svg:d="M176 495h703c98 0 177-79 177-177v-142c0-97-79-176-177-176h-703c-97 0-176 79-176 176v142c0 98 79 177 176 177z">
          <text:p/>
        </draw:path>
        <draw:frame draw:style-name="gr89" draw:text-style-name="P79" draw:layer="layout" svg:width="0.667cm" svg:height="0.247cm" svg:x="1.917cm" svg:y="13.437cm">
          <draw:text-box>
            <text:p text:style-name="P65"><text:span text:style-name="T13">React</text:span></text:p>
          </draw:text-box>
        </draw:frame>
        <draw:path draw:style-name="gr87" draw:text-style-name="P78" draw:layer="layout" svg:width="1.274cm" svg:height="0.494cm" svg:x="4.138cm" svg:y="13.264cm" svg:viewBox="0 0 1275 495" svg:d="M176 495h922c98 0 177-79 177-177v-142c0-97-79-176-177-176h-922c-97 0-176 79-176 176v142c0 98 79 177 176 177z">
          <text:p/>
        </draw:path>
        <draw:frame draw:style-name="gr90" draw:text-style-name="P79" draw:layer="layout" svg:width="0.629cm" svg:height="0.247cm" svg:x="3.154cm" svg:y="13.437cm">
          <draw:text-box>
            <text:p text:style-name="P65"><text:span text:style-name="T13">Flask</text:span></text:p>
          </draw:text-box>
        </draw:frame>
        <draw:path draw:style-name="gr91" draw:text-style-name="P68" draw:layer="layout" svg:width="5.636cm" svg:height="0.847cm" svg:x="0.846cm" svg:y="14.322cm" svg:viewBox="0 0 5637 848" svg:d="M282 848h5073c156 0 282-126 282-282v-284c0-155-126-282-282-282h-5073c-155 0-282 127-282 282v284c0 156 127 282 282 282z">
          <text:p/>
        </draw:path>
        <draw:frame draw:style-name="gr92" draw:text-style-name="P79" draw:layer="layout" svg:width="0.844cm" svg:height="0.247cm" svg:x="4.35cm" svg:y="13.437cm">
          <draw:text-box>
            <text:p text:style-name="P65"><text:span text:style-name="T13">MySQL</text:span></text:p>
          </draw:text-box>
        </draw:frame>
        <draw:frame draw:style-name="gr93" draw:text-style-name="P80" draw:layer="layout" svg:width="1.082cm" svg:height="0.391cm" svg:x="2.493cm" svg:y="14.569cm">
          <draw:text-box>
            <text:p text:style-name="P65"><text:span text:style-name="T14">From </text:span></text:p>
          </draw:text-box>
        </draw:frame>
        <draw:path draw:style-name="gr81" draw:text-style-name="P73" draw:layer="layout" svg:width="6.342cm" svg:height="5.221cm" svg:x="7.399cm" svg:y="10.653cm" svg:viewBox="0 0 6343 5222" svg:d="M424 5222h5495c234 0 424-189 424-423v-4375c0-234-190-424-424-424h-5495c-234 0-424 190-424 424v4375c0 234 190 423 424 423z">
          <text:p/>
        </draw:path>
        <draw:path draw:style-name="gr94" draw:text-style-name="P81" draw:layer="layout" svg:width="6.341cm" svg:height="5.221cm" svg:x="7.329cm" svg:y="10.583cm" svg:viewBox="0 0 6342 5222" svg:d="M423 5222h5496c234 0 423-190 423-423v-4376c0-234-189-423-423-423h-5496c-234 0-423 189-423 423v4376c0 233 189 423 423 423z">
          <text:p/>
        </draw:path>
        <draw:path draw:style-name="gr95" draw:text-style-name="P82" draw:layer="layout" svg:width="6.341cm" svg:height="0.988cm" svg:x="7.329cm" svg:y="10.583cm" svg:viewBox="0 0 6342 989" svg:d="M423 989h5496c234 0 423-190 423-425v-141c0-234-189-423-423-423h-5496c-234 0-423 189-423 423v141c0 235 189 425 423 425z">
          <text:p/>
        </draw:path>
        <draw:polygon draw:style-name="gr95" draw:text-style-name="P82" draw:layer="layout" svg:width="6.341cm" svg:height="0.494cm" svg:x="7.329cm" svg:y="11.077cm" svg:viewBox="0 0 6342 495" draw:points="0,495 6342,495 6342,0 0,0">
          <text:p/>
        </draw:polygon>
        <draw:frame draw:style-name="gr96" draw:text-style-name="P69" draw:layer="layout" svg:width="1.032cm" svg:height="0.391cm" svg:x="3.988cm" svg:y="14.58cm">
          <draw:text-box>
            <text:p text:style-name="P65"><text:span text:style-name="T14">3,40</text:span><text:span text:style-name="T14">0</text:span></text:p>
          </draw:text-box>
        </draw:frame>
        <draw:frame draw:style-name="gr97" draw:text-style-name="P76" draw:layer="layout" svg:width="2.542cm" svg:height="0.424cm" svg:x="9.23cm" svg:y="11.827cm">
          <draw:text-box>
            <text:p text:style-name="P65"><text:span text:style-name="T15">Sm</text:span><text:span text:style-name="T15">all </text:span><text:span text:style-name="T15">Wor</text:span><text:span text:style-name="T15">ks</text:span></text:p>
          </draw:text-box>
        </draw:frame>
        <draw:frame draw:style-name="gr98" draw:text-style-name="P77" draw:layer="layout" svg:width="2.021cm" svg:height="0.302cm" svg:x="9.492cm" svg:y="12.481cm">
          <draw:text-box>
            <text:p text:style-name="P65"><text:span text:style-name="T12">Quick </text:span><text:span text:style-name="T12">design &amp;</text:span></text:p>
          </draw:text-box>
        </draw:frame>
        <draw:path draw:style-name="gr87" draw:text-style-name="P78" draw:layer="layout" svg:width="0.904cm" svg:height="0.494cm" svg:x="8.444cm" svg:y="13.264cm" svg:viewBox="0 0 905 495" svg:d="M178 495h551c97 0 176-79 176-177v-142c0-97-79-176-176-176h-551c-99 0-178 79-178 176v142c0 98 79 177 178 177z">
          <text:p/>
        </draw:path>
        <draw:frame draw:style-name="gr99" draw:text-style-name="P77" draw:layer="layout" svg:width="1.971cm" svg:height="0.302cm" svg:x="9.517cm" svg:y="12.905cm">
          <draw:text-box>
            <text:p text:style-name="P65"><text:span text:style-name="T12">formattin</text:span><text:span text:style-name="T12">g jobs</text:span></text:p>
          </draw:text-box>
        </draw:frame>
        <draw:path draw:style-name="gr87" draw:text-style-name="P78" draw:layer="layout" svg:width="1.192cm" svg:height="0.494cm" svg:x="9.489cm" svg:y="13.264cm" svg:viewBox="0 0 1193 495" svg:d="M176 495h841c97 0 176-79 176-177v-142c0-97-79-176-176-176h-841c-97 0-176 79-176 176v142c0 98 79 177 176 177z">
          <text:p/>
        </draw:path>
        <draw:frame draw:style-name="gr100" draw:text-style-name="P79" draw:layer="layout" svg:width="0.476cm" svg:height="0.247cm" svg:x="8.656cm" svg:y="13.437cm">
          <draw:text-box>
            <text:p text:style-name="P65"><text:span text:style-name="T13">PPT</text:span></text:p>
          </draw:text-box>
        </draw:frame>
        <draw:path draw:style-name="gr87" draw:text-style-name="P78" draw:layer="layout" svg:width="1.521cm" svg:height="0.494cm" svg:x="10.822cm" svg:y="13.264cm" svg:viewBox="0 0 1522 495" svg:d="M176 495h1170c97 0 176-79 176-177v-142c0-97-79-176-176-176h-1170c-97 0-176 79-176 176v142c0 98 79 177 176 177z">
          <text:p/>
        </draw:path>
        <draw:frame draw:style-name="gr101" draw:text-style-name="P79" draw:layer="layout" svg:width="0.764cm" svg:height="0.247cm" svg:x="9.701cm" svg:y="13.437cm">
          <draw:text-box>
            <text:p text:style-name="P65"><text:span text:style-name="T13">Poster</text:span></text:p>
          </draw:text-box>
        </draw:frame>
        <draw:path draw:style-name="gr91" draw:text-style-name="P68" draw:layer="layout" svg:width="5.635cm" svg:height="0.847cm" svg:x="7.682cm" svg:y="14.322cm" svg:viewBox="0 0 5636 848" svg:d="M282 848h5072c156 0 282-126 282-282v-284c0-155-126-282-282-282h-5072c-156 0-282 127-282 282v284c0 156 126 282 282 282z">
          <text:p/>
        </draw:path>
        <draw:frame draw:style-name="gr102" draw:text-style-name="P79" draw:layer="layout" svg:width="1.09cm" svg:height="0.247cm" svg:x="11.034cm" svg:y="13.437cm">
          <draw:text-box>
            <text:p text:style-name="P65"><text:span text:style-name="T13">Brochure</text:span></text:p>
          </draw:text-box>
        </draw:frame>
        <draw:frame draw:style-name="gr93" draw:text-style-name="P80" draw:layer="layout" svg:width="1.082cm" svg:height="0.391cm" svg:x="9.49cm" svg:y="14.569cm">
          <draw:text-box>
            <text:p text:style-name="P65"><text:span text:style-name="T16">From </text:span></text:p>
          </draw:text-box>
        </draw:frame>
        <draw:path draw:style-name="gr81" draw:text-style-name="P73" draw:layer="layout" svg:width="6.341cm" svg:height="5.221cm" svg:x="14.235cm" svg:y="10.653cm" svg:viewBox="0 0 6342 5222" svg:d="M423 5222h5496c234 0 423-189 423-423v-4375c0-234-189-424-423-424h-5496c-234 0-423 190-423 424v4375c0 234 189 423 423 423z">
          <text:p/>
        </draw:path>
        <draw:path draw:style-name="gr82" draw:text-style-name="P74" draw:layer="layout" svg:width="6.342cm" svg:height="5.221cm" svg:x="14.164cm" svg:y="10.583cm" svg:viewBox="0 0 6343 5222" svg:d="M423 5222h5496c234 0 424-190 424-423v-4376c0-234-190-423-424-423h-5496c-233 0-423 189-423 423v4376c0 233 190 423 423 423z">
          <text:p/>
        </draw:path>
        <draw:path draw:style-name="gr1" draw:text-style-name="P1" draw:layer="layout" svg:width="6.342cm" svg:height="0.988cm" svg:x="14.164cm" svg:y="10.583cm" svg:viewBox="0 0 6343 989" svg:d="M423 989h5496c234 0 424-190 424-425v-141c0-234-190-423-424-423h-5496c-233 0-423 189-423 423v141c0 235 190 425 423 425z">
          <text:p/>
        </draw:path>
        <draw:polygon draw:style-name="gr1" draw:text-style-name="P1" draw:layer="layout" svg:width="6.342cm" svg:height="0.494cm" svg:x="14.164cm" svg:y="11.077cm" svg:viewBox="0 0 6343 495" draw:points="0,495 6343,495 6343,0 0,0">
          <text:p/>
        </draw:polygon>
        <draw:frame draw:style-name="gr103" draw:text-style-name="P69" draw:layer="layout" svg:width="0.65cm" svg:height="0.391cm" svg:x="10.871cm" svg:y="14.58cm">
          <draw:text-box>
            <text:p text:style-name="P65"><text:span text:style-name="T16">249</text:span></text:p>
          </draw:text-box>
        </draw:frame>
        <draw:frame draw:style-name="gr104" draw:text-style-name="P76" draw:layer="layout" svg:width="3.012cm" svg:height="0.424cm" svg:x="15.83cm" svg:y="11.827cm">
          <draw:text-box>
            <text:p text:style-name="P65"><text:span text:style-name="T17">Business Sites</text:span></text:p>
          </draw:text-box>
        </draw:frame>
        <draw:frame draw:style-name="gr105" draw:text-style-name="P77" draw:layer="layout" svg:width="2.906cm" svg:height="0.302cm" svg:x="15.886cm" svg:y="12.481cm">
          <draw:text-box>
            <text:p text:style-name="P65"><text:span text:style-name="T12">Professi</text:span><text:span text:style-name="T12">onal </text:span><text:span text:style-name="T12">websites</text:span></text:p>
          </draw:text-box>
        </draw:frame>
        <draw:path draw:style-name="gr87" draw:text-style-name="P78" draw:layer="layout" svg:width="1.096cm" svg:height="0.494cm" svg:x="15.403cm" svg:y="13.264cm" svg:viewBox="0 0 1097 495" svg:d="M177 495h744c97 0 176-79 176-177v-142c0-97-79-176-176-176h-744c-98 0-177 79-177 176v142c0 98 79 177 177 177z">
          <text:p/>
        </draw:path>
        <draw:frame draw:style-name="gr106" draw:text-style-name="P77" draw:layer="layout" svg:width="1.869cm" svg:height="0.302cm" svg:x="16.402cm" svg:y="12.905cm">
          <draw:text-box>
            <text:p text:style-name="P65"><text:span text:style-name="T12">for real clients</text:span></text:p>
          </draw:text-box>
        </draw:frame>
        <draw:path draw:style-name="gr87" draw:text-style-name="P78" draw:layer="layout" svg:width="1.315cm" svg:height="0.494cm" svg:x="16.64cm" svg:y="13.264cm" svg:viewBox="0 0 1316 495" svg:d="M176 495h964c97 0 176-79 176-177v-142c0-97-79-176-176-176h-964c-97 0-176 79-176 176v142c0 98 79 177 176 177z">
          <text:p/>
        </draw:path>
        <draw:frame draw:style-name="gr89" draw:text-style-name="P79" draw:layer="layout" svg:width="0.667cm" svg:height="0.247cm" svg:x="15.615cm" svg:y="13.437cm">
          <draw:text-box>
            <text:p text:style-name="P65"><text:span text:style-name="T13">Clinic</text:span></text:p>
          </draw:text-box>
        </draw:frame>
        <draw:path draw:style-name="gr87" draw:text-style-name="P78" draw:layer="layout" svg:width="0.959cm" svg:height="0.494cm" svg:x="18.096cm" svg:y="13.264cm" svg:viewBox="0 0 960 495" svg:d="M177 495h607c97 0 176-79 176-177v-142c0-97-79-176-176-176h-607c-98 0-177 79-177 176v142c0 98 79 177 177 177z">
          <text:p/>
        </draw:path>
        <draw:frame draw:style-name="gr107" draw:text-style-name="P79" draw:layer="layout" svg:width="0.887cm" svg:height="0.247cm" svg:x="16.852cm" svg:y="13.437cm">
          <draw:text-box>
            <text:p text:style-name="P65"><text:span text:style-name="T13">Agency</text:span></text:p>
          </draw:text-box>
        </draw:frame>
        <draw:path draw:style-name="gr91" draw:text-style-name="P68" draw:layer="layout" svg:width="5.636cm" svg:height="0.847cm" svg:x="14.517cm" svg:y="14.322cm" svg:viewBox="0 0 5637 848" svg:d="M282 848h5073c155 0 282-126 282-282v-284c0-155-127-282-282-282h-5073c-156 0-282 127-282 282v284c0 156 126 282 282 282z">
          <text:p/>
        </draw:path>
        <draw:frame draw:style-name="gr108" draw:text-style-name="P79" draw:layer="layout" svg:width="0.531cm" svg:height="0.247cm" svg:x="18.309cm" svg:y="13.437cm">
          <draw:text-box>
            <text:p text:style-name="P65"><text:span text:style-name="T13">Cafe</text:span></text:p>
          </draw:text-box>
        </draw:frame>
        <draw:frame draw:style-name="gr93" draw:text-style-name="P80" draw:layer="layout" svg:width="1.082cm" svg:height="0.391cm" svg:x="16.055cm" svg:y="14.569cm">
          <draw:text-box>
            <text:p text:style-name="P65"><text:span text:style-name="T18">From </text:span></text:p>
          </draw:text-box>
        </draw:frame>
        <draw:frame draw:style-name="gr109" draw:text-style-name="P69" draw:layer="layout" svg:width="1.192cm" svg:height="0.391cm" svg:x="17.323cm" svg:y="14.58cm">
          <draw:text-box>
            <text:p text:style-name="P65"><text:span text:style-name="T18">19,999</text:span></text:p>
          </draw:text-box>
        </draw:frame>
        <draw:path draw:style-name="gr95" draw:text-style-name="P82" draw:layer="layout" svg:width="0.988cm" svg:height="0.988cm" svg:x="2.501cm" svg:y="17.356cm" svg:viewBox="0 0 989 989" svg:d="M989 494c0-273-222-494-495-494s-494 221-494 494 221 495 494 495 495-222 495-495z">
          <text:p/>
        </draw:path>
        <draw:frame draw:style-name="gr110" draw:text-style-name="P83" draw:layer="layout" svg:width="2.898cm" svg:height="0.458cm" svg:x="9.048cm" svg:y="16.317cm">
          <draw:text-box>
            <text:p text:style-name="P65"><text:span text:style-name="T19">How It Works</text:span></text:p>
          </draw:text-box>
        </draw:frame>
        <draw:line draw:style-name="gr111" draw:text-style-name="P71" draw:layer="layout" svg:x1="3.524cm" svg:y1="17.85cm" svg:x2="7.469cm" svg:y2="17.85cm">
          <text:p/>
        </draw:line>
        <draw:frame draw:style-name="gr112" draw:text-style-name="P80" draw:layer="layout" svg:width="0.387cm" svg:height="0.391cm" svg:x="2.888cm" svg:y="17.709cm">
          <draw:text-box>
            <text:p text:style-name="P65"><text:span text:style-name="T20">1</text:span></text:p>
          </draw:text-box>
        </draw:frame>
        <draw:frame draw:style-name="gr98" draw:text-style-name="P77" draw:layer="layout" svg:width="2.021cm" svg:height="0.302cm" svg:x="1.987cm" svg:y="18.408cm">
          <draw:text-box>
            <text:p text:style-name="P65"><text:span text:style-name="T21">Pick a Service</text:span></text:p>
          </draw:text-box>
        </draw:frame>
        <draw:frame draw:style-name="gr113" draw:text-style-name="P84" draw:layer="layout" svg:width="1.543cm" svg:height="0.268cm" svg:x="2.231cm" svg:y="18.857cm">
          <draw:text-box>
            <text:p text:style-name="P65"><text:span text:style-name="T7">Choose CSE</text:span></text:p>
          </draw:text-box>
        </draw:frame>
        <draw:frame draw:style-name="gr114" draw:text-style-name="P84" draw:layer="layout" svg:width="0.993cm" svg:height="0.268cm" svg:x="2.503cm" svg:y="19.21cm">
          <draw:text-box>
            <text:p text:style-name="P65"><text:span text:style-name="T7">Creative</text:span></text:p>
          </draw:text-box>
        </draw:frame>
        <draw:path draw:style-name="gr95" draw:text-style-name="P82" draw:layer="layout" svg:width="0.988cm" svg:height="0.988cm" svg:x="7.504cm" svg:y="17.356cm" svg:viewBox="0 0 989 989" svg:d="M989 494c0-273-222-494-495-494s-494 221-494 494 221 495 494 495 495-222 495-495z">
          <text:p/>
        </draw:path>
        <draw:frame draw:style-name="gr115" draw:text-style-name="P84" draw:layer="layout" svg:width="1.395cm" svg:height="0.268cm" svg:x="2.304cm" svg:y="19.563cm">
          <draw:text-box>
            <text:p text:style-name="P65"><text:span text:style-name="T7">or Business</text:span></text:p>
          </draw:text-box>
        </draw:frame>
        <draw:line draw:style-name="gr111" draw:text-style-name="P71" draw:layer="layout" svg:x1="8.527cm" svg:y1="17.85cm" svg:x2="12.472cm" svg:y2="17.85cm">
          <text:p/>
        </draw:line>
        <draw:frame draw:style-name="gr112" draw:text-style-name="P80" draw:layer="layout" svg:width="0.387cm" svg:height="0.391cm" svg:x="7.891cm" svg:y="17.709cm">
          <draw:text-box>
            <text:p text:style-name="P65"><text:span text:style-name="T20">2</text:span></text:p>
          </draw:text-box>
        </draw:frame>
        <draw:frame draw:style-name="gr116" draw:text-style-name="P77" draw:layer="layout" svg:width="1.903cm" svg:height="0.302cm" svg:x="7.049cm" svg:y="18.408cm">
          <draw:text-box>
            <text:p text:style-name="P65"><text:span text:style-name="T21">Share Details</text:span></text:p>
          </draw:text-box>
        </draw:frame>
        <draw:path draw:style-name="gr95" draw:text-style-name="P82" draw:layer="layout" svg:width="0.988cm" svg:height="0.988cm" svg:x="12.507cm" svg:y="17.356cm" svg:viewBox="0 0 989 989" svg:d="M989 494c0-273-222-494-495-494s-494 221-494 494 221 495 494 495 495-222 495-495z">
          <text:p/>
        </draw:path>
        <draw:frame draw:style-name="gr117" draw:text-style-name="P84" draw:layer="layout" svg:width="4.163cm" svg:height="0.268cm" svg:x="5.933cm" svg:y="18.857cm">
          <draw:text-box>
            <text:p text:style-name="P65"><text:span text:style-name="T7">Fill the form with your requirements</text:span></text:p>
          </draw:text-box>
        </draw:frame>
        <draw:line draw:style-name="gr111" draw:text-style-name="P71" draw:layer="layout" svg:x1="13.53cm" svg:y1="17.85cm" svg:x2="17.475cm" svg:y2="17.85cm">
          <text:p/>
        </draw:line>
        <draw:frame draw:style-name="gr112" draw:text-style-name="P80" draw:layer="layout" svg:width="0.387cm" svg:height="0.391cm" svg:x="12.894cm" svg:y="17.709cm">
          <draw:text-box>
            <text:p text:style-name="P65"><text:span text:style-name="T20">3</text:span></text:p>
          </draw:text-box>
        </draw:frame>
        <draw:frame draw:style-name="gr118" draw:text-style-name="P77" draw:layer="layout" svg:width="1.551cm" svg:height="0.302cm" svg:x="12.227cm" svg:y="18.408cm">
          <draw:text-box>
            <text:p text:style-name="P65"><text:span text:style-name="T21">We Build It</text:span></text:p>
          </draw:text-box>
        </draw:frame>
        <draw:frame draw:style-name="gr119" draw:text-style-name="P84" draw:layer="layout" svg:width="1.839cm" svg:height="0.268cm" svg:x="12.09cm" svg:y="18.857cm">
          <draw:text-box>
            <text:p text:style-name="P65"><text:span text:style-name="T7">Delivered clean</text:span></text:p>
          </draw:text-box>
        </draw:frame>
        <draw:frame draw:style-name="gr120" draw:text-style-name="P84" draw:layer="layout" svg:width="0.874cm" svg:height="0.268cm" svg:x="12.568cm" svg:y="19.21cm">
          <draw:text-box>
            <text:p text:style-name="P65"><text:span text:style-name="T7">on time</text:span></text:p>
          </draw:text-box>
        </draw:frame>
        <draw:path draw:style-name="gr95" draw:text-style-name="P82" draw:layer="layout" svg:width="0.988cm" svg:height="0.988cm" svg:x="17.51cm" svg:y="17.356cm" svg:viewBox="0 0 989 989" svg:d="M989 494c0-273-221-494-495-494-273 0-494 221-494 494s221 495 494 495c274 0 495-222 495-495z">
          <text:p/>
        </draw:path>
        <draw:frame draw:style-name="gr121" draw:text-style-name="P84" draw:layer="layout" svg:width="1.23cm" svg:height="0.268cm" svg:x="12.391cm" svg:y="19.563cm">
          <draw:text-box>
            <text:p text:style-name="P65"><text:span text:style-name="T7">every time</text:span></text:p>
          </draw:text-box>
        </draw:frame>
        <draw:frame draw:style-name="gr112" draw:text-style-name="P80" draw:layer="layout" svg:width="0.387cm" svg:height="0.391cm" svg:x="17.897cm" svg:y="17.709cm">
          <draw:text-box>
            <text:p text:style-name="P65"><text:span text:style-name="T20">4</text:span></text:p>
          </draw:text-box>
        </draw:frame>
        <draw:frame draw:style-name="gr122" draw:text-style-name="P77" draw:layer="layout" svg:width="1.721cm" svg:height="0.302cm" svg:x="17.147cm" svg:y="18.408cm">
          <draw:text-box>
            <text:p text:style-name="P65"><text:span text:style-name="T21">You Launch</text:span></text:p>
          </draw:text-box>
        </draw:frame>
        <draw:frame draw:style-name="gr123" draw:text-style-name="P84" draw:layer="layout" svg:width="0.921cm" svg:height="0.268cm" svg:x="17.549cm" svg:y="18.857cm">
          <draw:text-box>
            <text:p text:style-name="P65"><text:span text:style-name="T7">Present</text:span></text:p>
          </draw:text-box>
        </draw:frame>
        <draw:frame draw:style-name="gr124" draw:text-style-name="P84" draw:layer="layout" svg:width="0.844cm" svg:height="0.268cm" svg:x="17.585cm" svg:y="19.21cm">
          <draw:text-box>
            <text:p text:style-name="P65"><text:span text:style-name="T7">publish</text:span></text:p>
          </draw:text-box>
        </draw:frame>
        <draw:path draw:style-name="gr125" draw:text-style-name="P74" draw:layer="layout" svg:width="20.013cm" svg:height="1.835cm" svg:x="0.493cm" svg:y="20.037cm" svg:viewBox="0 0 20014 1836" svg:d="M424 1836h19166c234 0 424-190 424-424v-988c0-234-190-424-424-424h-19166c-234 0-424 190-424 424v988c0 234 190 424 424 424z">
          <text:p/>
        </draw:path>
        <draw:frame draw:style-name="gr126" draw:text-style-name="P84" draw:layer="layout" svg:width="2.284cm" svg:height="0.268cm" svg:x="16.872cm" svg:y="19.563cm">
          <draw:text-box>
            <text:p text:style-name="P65"><text:span text:style-name="T7">or go live with ease</text:span></text:p>
          </draw:text-box>
        </draw:frame>
        <draw:frame draw:style-name="gr127" draw:text-style-name="P85" draw:layer="layout" svg:width="1.687cm" svg:height="0.285cm" svg:x="2.99cm" svg:y="20.679cm">
          <draw:text-box>
            <text:p text:style-name="P65"><text:span text:style-name="T22">CSE Projects</text:span></text:p>
          </draw:text-box>
        </draw:frame>
        <draw:frame draw:style-name="gr128" draw:text-style-name="P83" draw:layer="layout" svg:width="1.653cm" svg:height="0.458cm" svg:x="2.427cm" svg:y="21.115cm">
          <draw:text-box>
            <text:p text:style-name="P65"><text:span text:style-name="T23">3,400 – </text:span></text:p>
          </draw:text-box>
        </draw:frame>
        <draw:line draw:style-name="gr78" draw:text-style-name="P71" draw:layer="layout" svg:x1="7.164cm" svg:y1="21.531cm" svg:x2="7.164cm" svg:y2="20.472cm">
          <text:p/>
        </draw:line>
        <draw:frame draw:style-name="gr129" draw:text-style-name="P83" draw:layer="layout" svg:width="1.145cm" svg:height="0.458cm" svg:x="4.433cm" svg:y="21.115cm">
          <draw:text-box>
            <text:p text:style-name="P65"><text:span text:style-name="T23">6,300</text:span></text:p>
          </draw:text-box>
        </draw:frame>
        <draw:frame draw:style-name="gr130" draw:text-style-name="P85" draw:layer="layout" svg:width="1.59cm" svg:height="0.285cm" svg:x="9.708cm" svg:y="20.679cm">
          <draw:text-box>
            <text:p text:style-name="P65"><text:span text:style-name="T22">Small Works</text:span></text:p>
          </draw:text-box>
        </draw:frame>
        <draw:frame draw:style-name="gr131" draw:text-style-name="P83" draw:layer="layout" svg:width="1.272cm" svg:height="0.458cm" svg:x="9.289cm" svg:y="21.115cm">
          <draw:text-box>
            <text:p text:style-name="P65"><text:span text:style-name="T24">249 – </text:span></text:p>
          </draw:text-box>
        </draw:frame>
        <draw:line draw:style-name="gr78" draw:text-style-name="P71" draw:layer="layout" svg:x1="13.835cm" svg:y1="21.481cm" svg:x2="13.835cm" svg:y2="20.422cm">
          <text:p/>
        </draw:line>
        <draw:frame draw:style-name="gr129" draw:text-style-name="P83" draw:layer="layout" svg:width="1.145cm" svg:height="0.458cm" svg:x="10.913cm" svg:y="21.115cm">
          <draw:text-box>
            <text:p text:style-name="P65"><text:span text:style-name="T24">1,499</text:span></text:p>
          </draw:text-box>
        </draw:frame>
        <draw:frame draw:style-name="gr132" draw:text-style-name="P85" draw:layer="layout" svg:width="1.86cm" svg:height="0.285cm" svg:x="16.245cm" svg:y="20.679cm">
          <draw:text-box>
            <text:p text:style-name="P65"><text:span text:style-name="T22">Business Sites</text:span></text:p>
          </draw:text-box>
        </draw:frame>
        <draw:path draw:style-name="gr1" draw:text-style-name="P1" draw:layer="layout" svg:width="20.013cm" svg:height="2.752cm" svg:x="0.493cm" svg:y="22.225cm" svg:viewBox="0 0 20014 2753" svg:d="M494 2753h19026c272 0 494-221 494-494v-1765c0-272-222-494-494-494h-19026c-272 0-494 222-494 494v1765c0 273 222 494 494 494z">
          <text:p/>
        </draw:path>
        <draw:path draw:style-name="gr91" draw:text-style-name="P68" draw:layer="layout" svg:width="1.975cm" svg:height="1.976cm" svg:x="0.952cm" svg:y="22.47cm" svg:viewBox="0 0 1976 1977" svg:d="M211 1977h1553c117 0 212-96 212-213v-1552c0-117-95-212-212-212h-1553c-116 0-211 95-211 212v1552c0 117 95 213 211 213z">
          <text:p/>
        </draw:path>
        <draw:polygon draw:style-name="gr1" draw:text-style-name="P1" draw:layer="layout" svg:width="0.424cm" svg:height="0.423cm" svg:x="1.27cm" svg:y="24.059cm" svg:viewBox="0 0 425 424" draw:points="0,424 425,424 425,0 0,0">
          <text:p/>
        </draw:polygon>
        <draw:polygon draw:style-name="gr1" draw:text-style-name="P1" draw:layer="layout" svg:width="0.424cm" svg:height="0.423cm" svg:x="2.257cm" svg:y="24.059cm" svg:viewBox="0 0 425 424" draw:points="0,424 425,424 425,0 0,0">
          <text:p/>
        </draw:polygon>
        <draw:polygon draw:style-name="gr133" draw:text-style-name="P86" draw:layer="layout" svg:width="0.424cm" svg:height="0.423cm" svg:x="1.763cm" svg:y="23.565cm" svg:viewBox="0 0 425 424" draw:points="0,424 425,424 425,0 0,0">
          <text:p/>
        </draw:polygon>
        <draw:polygon draw:style-name="gr1" draw:text-style-name="P1" draw:layer="layout" svg:width="0.424cm" svg:height="0.423cm" svg:x="1.27cm" svg:y="23.071cm" svg:viewBox="0 0 425 424" draw:points="0,424 425,424 425,0 0,0">
          <text:p/>
        </draw:polygon>
        <draw:frame draw:style-name="gr134" draw:text-style-name="P83" draw:layer="layout" svg:width="1.666cm" svg:height="0.458cm" svg:x="16.51cm" svg:y="21.115cm">
          <draw:text-box>
            <text:p text:style-name="P65"><text:span text:style-name="T19">19,999+</text:span></text:p>
          </draw:text-box>
        </draw:frame>
        <draw:frame draw:style-name="gr135" draw:text-style-name="P87" draw:layer="layout" svg:width="1.272cm" svg:height="0.23cm" svg:x="1.268cm" svg:y="24.638cm">
          <draw:text-box>
            <text:p text:style-name="P65"><text:span text:style-name="T25">Scan to Visit</text:span></text:p>
          </draw:text-box>
        </draw:frame>
        <draw:frame draw:style-name="gr136" draw:text-style-name="P88" draw:layer="layout" svg:width="7.482cm" svg:height="0.602cm" svg:x="6.198cm" svg:y="22.456cm">
          <draw:text-box>
            <text:p text:style-name="P65"><text:span text:style-name="T26">Ready to Build Something</text:span></text:p>
          </draw:text-box>
        </draw:frame>
        <draw:frame draw:style-name="gr137" draw:text-style-name="P90" draw:layer="layout" svg:width="4.676cm" svg:height="0.602cm" svg:x="7.772cm" svg:y="23.368cm">
          <draw:text-box>
            <text:p text:style-name="P89"><text:span text:style-name="T27">Great Together?</text:span></text:p>
          </draw:text-box>
        </draw:frame>
        <draw:frame draw:style-name="gr138" draw:text-style-name="P91" draw:layer="layout" svg:width="8.85cm" svg:height="0.319cm" svg:x="5.664cm" svg:y="24.322cm">
          <draw:text-box>
            <text:p text:style-name="P65"><text:span text:style-name="T28">gururajachar2008@gmail.com <text:s/>• <text:s/>github.com/gururajachar2008</text:span></text:p>
          </draw:text-box>
        </draw:frame>
        <draw:frame draw:style-name="gr139" draw:text-style-name="P92" draw:layer="layout" svg:width="2.694cm" svg:height="0.336cm" svg:x="16.51cm" svg:y="23.495cm">
          <draw:text-box>
            <text:p text:style-name="P65"><text:span text:style-name="T29">Send a Request <text:s/></text:span></text:p>
          </draw:text-box>
        </draw:frame>
        <draw:frame draw:style-name="gr140" draw:text-style-name="P93" draw:layer="layout" svg:width="0.264cm" svg:height="0.335cm" svg:x="19.116cm" svg:y="23.495cm">
          <draw:text-box>
            <text:p text:style-name="P65"><text:span text:style-name="T30">→</text:span></text:p>
          </draw:text-box>
        </draw:frame>
        <draw:path draw:style-name="gr133" draw:text-style-name="P86" draw:layer="layout" svg:width="0.106cm" svg:height="0.106cm" svg:x="1.358cm" svg:y="26.052cm" svg:viewBox="0 0 107 107" svg:d="M107 54c0-30-24-54-54-54s-53 24-53 54c0 29 23 53 53 53s54-24 54-53z">
          <text:p/>
        </draw:path>
        <draw:path draw:style-name="gr133" draw:text-style-name="P86" draw:layer="layout" svg:width="0.106cm" svg:height="0.106cm" svg:x="1.993cm" svg:y="26.052cm" svg:viewBox="0 0 107 107" svg:d="M107 54c0-30-24-54-54-54s-53 24-53 54c0 29 23 53 53 53s54-24 54-53z">
          <text:p/>
        </draw:path>
        <draw:path draw:style-name="gr133" draw:text-style-name="P86" draw:layer="layout" svg:width="0.106cm" svg:height="0.106cm" svg:x="2.628cm" svg:y="26.052cm" svg:viewBox="0 0 107 107" svg:d="M107 54c0-30-24-54-53-54-31 0-54 24-54 54 0 29 23 53 54 53 29 0 53-24 53-53z">
          <text:p/>
        </draw:path>
        <draw:path draw:style-name="gr133" draw:text-style-name="P86" draw:layer="layout" svg:width="0.106cm" svg:height="0.106cm" svg:x="3.263cm" svg:y="26.052cm" svg:viewBox="0 0 107 107" svg:d="M107 54c0-30-24-54-53-54-31 0-54 24-54 54 0 29 23 53 54 53 29 0 53-24 53-53z">
          <text:p/>
        </draw:path>
        <draw:path draw:style-name="gr133" draw:text-style-name="P86" draw:layer="layout" svg:width="0.106cm" svg:height="0.106cm" svg:x="3.898cm" svg:y="26.052cm" svg:viewBox="0 0 107 107" svg:d="M107 54c0-30-24-54-53-54-31 0-54 24-54 54 0 29 23 53 54 53 29 0 53-24 53-53z">
          <text:p/>
        </draw:path>
        <draw:path draw:style-name="gr133" draw:text-style-name="P86" draw:layer="layout" svg:width="0.106cm" svg:height="0.106cm" svg:x="4.533cm" svg:y="26.052cm" svg:viewBox="0 0 107 107" svg:d="M107 54c0-30-24-54-53-54-31 0-54 24-54 54 0 29 23 53 54 53 29 0 53-24 53-53z">
          <text:p/>
        </draw:path>
        <draw:path draw:style-name="gr133" draw:text-style-name="P86" draw:layer="layout" svg:width="0.106cm" svg:height="0.106cm" svg:x="5.168cm" svg:y="26.052cm" svg:viewBox="0 0 107 107" svg:d="M107 54c0-30-24-54-53-54-31 0-54 24-54 54 0 29 23 53 54 53 29 0 53-24 53-53z">
          <text:p/>
        </draw:path>
        <draw:path draw:style-name="gr133" draw:text-style-name="P86" draw:layer="layout" svg:width="0.106cm" svg:height="0.106cm" svg:x="5.803cm" svg:y="26.052cm" svg:viewBox="0 0 107 107" svg:d="M107 54c0-30-24-54-53-54-31 0-54 24-54 54 0 29 23 53 54 53 29 0 53-24 53-53z">
          <text:p/>
        </draw:path>
        <draw:path draw:style-name="gr133" draw:text-style-name="P86" draw:layer="layout" svg:width="0.106cm" svg:height="0.106cm" svg:x="6.438cm" svg:y="26.052cm" svg:viewBox="0 0 107 107" svg:d="M107 54c0-30-24-54-53-54-30 0-54 24-54 54 0 29 24 53 54 53 29 0 53-24 53-53z">
          <text:p/>
        </draw:path>
        <draw:path draw:style-name="gr133" draw:text-style-name="P86" draw:layer="layout" svg:width="0.106cm" svg:height="0.106cm" svg:x="7.073cm" svg:y="26.052cm" svg:viewBox="0 0 107 107" svg:d="M107 54c0-30-24-54-53-54-30 0-54 24-54 54 0 29 24 53 54 53 29 0 53-24 53-53z">
          <text:p/>
        </draw:path>
        <draw:path draw:style-name="gr133" draw:text-style-name="P86" draw:layer="layout" svg:width="0.106cm" svg:height="0.106cm" svg:x="7.708cm" svg:y="26.052cm" svg:viewBox="0 0 107 107" svg:d="M107 54c0-30-24-54-53-54-30 0-54 24-54 54 0 29 24 53 54 53 29 0 53-24 53-53z">
          <text:p/>
        </draw:path>
        <draw:path draw:style-name="gr133" draw:text-style-name="P86" draw:layer="layout" svg:width="0.106cm" svg:height="0.106cm" svg:x="8.343cm" svg:y="26.052cm" svg:viewBox="0 0 107 107" svg:d="M107 54c0-30-24-54-53-54-30 0-54 24-54 54 0 29 24 53 54 53 29 0 53-24 53-53z">
          <text:p/>
        </draw:path>
        <draw:path draw:style-name="gr133" draw:text-style-name="P86" draw:layer="layout" svg:width="0.106cm" svg:height="0.106cm" svg:x="8.978cm" svg:y="26.052cm" svg:viewBox="0 0 107 107" svg:d="M107 54c0-30-25-54-54-54-30 0-53 24-53 54 0 29 23 53 53 53 29 0 54-24 54-53z">
          <text:p/>
        </draw:path>
        <draw:path draw:style-name="gr133" draw:text-style-name="P86" draw:layer="layout" svg:width="0.106cm" svg:height="0.106cm" svg:x="9.613cm" svg:y="26.052cm" svg:viewBox="0 0 107 107" svg:d="M107 54c0-30-25-54-54-54-30 0-53 24-53 54 0 29 23 53 53 53 29 0 54-24 54-53z">
          <text:p/>
        </draw:path>
        <draw:path draw:style-name="gr133" draw:text-style-name="P86" draw:layer="layout" svg:width="0.106cm" svg:height="0.106cm" svg:x="10.248cm" svg:y="26.052cm" svg:viewBox="0 0 107 107" svg:d="M107 54c0-30-25-54-54-54-30 0-53 24-53 54 0 29 23 53 53 53 29 0 54-24 54-53z">
          <text:p/>
        </draw:path>
        <draw:path draw:style-name="gr133" draw:text-style-name="P86" draw:layer="layout" svg:width="0.106cm" svg:height="0.106cm" svg:x="10.883cm" svg:y="26.052cm" svg:viewBox="0 0 107 107" svg:d="M107 54c0-30-25-54-54-54-30 0-53 24-53 54 0 29 23 53 53 53 29 0 54-24 54-53z">
          <text:p/>
        </draw:path>
        <draw:path draw:style-name="gr133" draw:text-style-name="P86" draw:layer="layout" svg:width="0.106cm" svg:height="0.106cm" svg:x="11.518cm" svg:y="26.052cm" svg:viewBox="0 0 107 107" svg:d="M107 54c0-30-25-54-54-54-30 0-53 24-53 54 0 29 23 53 53 53 29 0 54-24 54-53z">
          <text:p/>
        </draw:path>
        <draw:path draw:style-name="gr133" draw:text-style-name="P86" draw:layer="layout" svg:width="0.106cm" svg:height="0.106cm" svg:x="12.153cm" svg:y="26.052cm" svg:viewBox="0 0 107 107" svg:d="M107 54c0-30-24-54-54-54s-53 24-53 54c0 29 23 53 53 53s54-24 54-53z">
          <text:p/>
        </draw:path>
        <draw:path draw:style-name="gr133" draw:text-style-name="P86" draw:layer="layout" svg:width="0.106cm" svg:height="0.106cm" svg:x="12.788cm" svg:y="26.052cm" svg:viewBox="0 0 107 107" svg:d="M107 54c0-30-24-54-54-54s-53 24-53 54c0 29 23 53 53 53s54-24 54-53z">
          <text:p/>
        </draw:path>
        <draw:path draw:style-name="gr133" draw:text-style-name="P86" draw:layer="layout" svg:width="0.106cm" svg:height="0.106cm" svg:x="13.423cm" svg:y="26.052cm" svg:viewBox="0 0 107 107" svg:d="M107 54c0-30-24-54-54-54s-53 24-53 54c0 29 23 53 53 53s54-24 54-53z">
          <text:p/>
        </draw:path>
        <draw:path draw:style-name="gr133" draw:text-style-name="P86" draw:layer="layout" svg:width="0.106cm" svg:height="0.106cm" svg:x="14.058cm" svg:y="26.052cm" svg:viewBox="0 0 107 107" svg:d="M107 54c0-30-24-54-54-54s-53 24-53 54c0 29 23 53 53 53s54-24 54-53z">
          <text:p/>
        </draw:path>
        <draw:path draw:style-name="gr133" draw:text-style-name="P86" draw:layer="layout" svg:width="0.106cm" svg:height="0.106cm" svg:x="14.693cm" svg:y="26.052cm" svg:viewBox="0 0 107 107" svg:d="M107 54c0-30-24-54-54-54s-53 24-53 54c0 29 23 53 53 53s54-24 54-53z">
          <text:p/>
        </draw:path>
        <draw:path draw:style-name="gr133" draw:text-style-name="P86" draw:layer="layout" svg:width="0.106cm" svg:height="0.106cm" svg:x="15.328cm" svg:y="26.052cm" svg:viewBox="0 0 107 107" svg:d="M107 54c0-30-24-54-54-54s-53 24-53 54c0 29 23 53 53 53s54-24 54-53z">
          <text:p/>
        </draw:path>
        <draw:path draw:style-name="gr133" draw:text-style-name="P86" draw:layer="layout" svg:width="0.106cm" svg:height="0.106cm" svg:x="15.963cm" svg:y="26.052cm" svg:viewBox="0 0 107 107" svg:d="M107 54c0-30-24-54-53-54-31 0-54 24-54 54 0 29 23 53 54 53 29 0 53-24 53-53z">
          <text:p/>
        </draw:path>
        <draw:path draw:style-name="gr133" draw:text-style-name="P86" draw:layer="layout" svg:width="0.106cm" svg:height="0.106cm" svg:x="16.598cm" svg:y="26.052cm" svg:viewBox="0 0 107 107" svg:d="M107 54c0-30-24-54-53-54-31 0-54 24-54 54 0 29 23 53 54 53 29 0 53-24 53-53z">
          <text:p/>
        </draw:path>
        <draw:path draw:style-name="gr133" draw:text-style-name="P86" draw:layer="layout" svg:width="0.106cm" svg:height="0.106cm" svg:x="17.233cm" svg:y="26.052cm" svg:viewBox="0 0 107 107" svg:d="M107 54c0-30-24-54-53-54-31 0-54 24-54 54 0 29 23 53 54 53 29 0 53-24 53-53z">
          <text:p/>
        </draw:path>
        <draw:path draw:style-name="gr133" draw:text-style-name="P86" draw:layer="layout" svg:width="0.106cm" svg:height="0.106cm" svg:x="17.868cm" svg:y="26.052cm" svg:viewBox="0 0 107 107" svg:d="M107 54c0-30-24-54-53-54-31 0-54 24-54 54 0 29 23 53 54 53 29 0 53-24 53-53z">
          <text:p/>
        </draw:path>
        <draw:path draw:style-name="gr133" draw:text-style-name="P86" draw:layer="layout" svg:width="0.106cm" svg:height="0.106cm" svg:x="18.503cm" svg:y="26.052cm" svg:viewBox="0 0 107 107" svg:d="M107 54c0-30-24-54-53-54-31 0-54 24-54 54 0 29 23 53 54 53 29 0 53-24 53-53z">
          <text:p/>
        </draw:path>
        <draw:path draw:style-name="gr133" draw:text-style-name="P86" draw:layer="layout" svg:width="0.106cm" svg:height="0.106cm" svg:x="19.138cm" svg:y="26.052cm" svg:viewBox="0 0 107 107" svg:d="M107 54c0-30-24-54-53-54-31 0-54 24-54 54 0 29 23 53 54 53 29 0 53-24 53-53z">
          <text:p/>
        </draw:path>
        <draw:frame draw:style-name="gr141" draw:text-style-name="P84" draw:layer="layout" svg:width="11.771cm" svg:height="0.285cm" svg:x="5cm" svg:y="25.419cm">
          <draw:text-box>
            <text:p text:style-name="P65"><text:span text:style-name="T31">Project Studio <text:s/>· <text:s/>Chikkamagaluru, Karnataka, India <text:s/>· <text:s/></text:span><text:span text:style-name="T32">gururajachar2008.github.io/Portfolio2.0</text:span><text:span text:style-name="T31">/</text:span></text:p>
          </draw:text-box>
        </draw:frame>
        <draw:path draw:style-name="gr142" draw:text-style-name="P94" draw:layer="layout" svg:width="20.013cm" svg:height="2.752cm" svg:x="0.635cm" svg:y="26.352cm" svg:viewBox="0 0 20014 2753" svg:d="M494 2753h19026c272 0 494-221 494-494v-1765c0-272-222-494-494-494h-19026c-272 0-494 222-494 494v1765c0 273 222 494 494 494z">
          <text:p/>
        </draw:path>
        <draw:frame draw:style-name="gr143" draw:text-style-name="P95" draw:layer="layout" svg:width="1.778cm" svg:height="1.778cm" svg:x="1.016cm" svg:y="22.542cm">
          <draw:image xlink:href="Pictures/10000001000003E8000003E81FA57000.png" xlink:type="simple" xlink:show="embed" xlink:actuate="onLoad" draw:mime-type="image/png">
            <text:p/>
          </draw:image>
        </draw:frame>
        <draw:frame draw:style-name="gr144" draw:text-style-name="P96" draw:layer="layout" svg:width="5.383cm" svg:height="0.599cm" svg:x="8.23cm" svg:y="26.619cm">
          <draw:text-box>
            <text:p text:style-name="P89"><text:span text:style-name="T33">Our Technical Team</text:span></text:p>
          </draw:text-box>
        </draw:frame>
        <draw:frame draw:style-name="gr145" draw:text-style-name="P95" draw:layer="layout" svg:width="3.412cm" svg:height="3.412cm" svg:x="0.398cm" svg:y="3.89cm">
          <draw:image xlink:href="Pictures/1000024100000D5500000D5567282A1D.svg" xlink:type="simple" xlink:show="embed" xlink:actuate="onLoad" draw:mime-type="image/svg+xml">
            <text:p/>
          </draw:image>
          <draw:image xlink:href="Pictures/100000010000007800000078DE2D787A.png" xlink:type="simple" xlink:show="embed" xlink:actuate="onLoad" draw:mime-type="image/png"/>
        </draw:frame>
        <draw:frame draw:style-name="gr145" draw:text-style-name="P95" draw:layer="layout" svg:width="2.167cm" svg:height="2.167cm" svg:x="0.915cm" svg:y="26.67cm">
          <draw:image xlink:href="Pictures/1000024100000D5500000D5567282A1D.svg" xlink:type="simple" xlink:show="embed" xlink:actuate="onLoad" draw:mime-type="image/svg+xml">
            <text:p/>
          </draw:image>
          <draw:image xlink:href="Pictures/100000010000007800000078DE2D787A.png" xlink:type="simple" xlink:show="embed" xlink:actuate="onLoad" draw:mime-type="image/png"/>
        </draw:frame>
        <draw:frame draw:style-name="gr137" draw:text-style-name="P97" draw:layer="layout" svg:width="4.676cm" svg:height="0.602cm" svg:x="9.214cm" svg:y="27.305cm">
          <draw:text-box>
            <text:p text:style-name="P89"><text:span text:style-name="T34">Gururaj Achar</text:span></text:p>
          </draw:text-box>
        </draw:frame>
        <draw:line draw:style-name="gr78" draw:text-style-name="P71" draw:layer="layout" svg:x1="8.492cm" svg:y1="28.257cm" svg:x2="8.492cm" svg:y2="27.198cm">
          <text:p/>
        </draw:line>
        <draw:frame draw:style-name="gr146" draw:text-style-name="P98" draw:layer="layout" svg:width="3.634cm" svg:height="0.602cm" svg:x="9.582cm" svg:y="28.169cm">
          <draw:text-box>
            <text:p text:style-name="P89"><text:span text:style-name="T35">Lead developer</text:span></text:p>
          </draw:text-box>
        </draw:frame>
        <draw:path draw:style-name="gr62" draw:text-style-name="P62" draw:layer="layout" svg:width="0.317cm" svg:height="0.318cm" svg:x="8.785cm" svg:y="27.407cm" svg:viewBox="0 0 318 319" svg:d="M318 160c0-89-71-160-159-160s-159 71-159 160c0 88 71 159 159 159s159-71 159-159z">
          <text:p/>
        </draw:path>
        <draw:path draw:style-name="gr62" draw:text-style-name="P62" draw:layer="layout" svg:width="0.317cm" svg:height="0.318cm" svg:x="8.785cm" svg:y="27.407cm" svg:viewBox="0 0 318 319" svg:d="M318 160c0-89-71-160-159-160s-159 71-159 160c0 88 71 159 159 159s159-71 159-159z">
          <text:p/>
        </draw:path>
        <draw:frame draw:style-name="gr137" draw:text-style-name="P97" draw:layer="layout" svg:width="4.676cm" svg:height="0.602cm" svg:x="9.21cm" svg:y="27.306cm">
          <draw:text-box>
            <text:p text:style-name="P89"><text:span text:style-name="T34">Gururaj Achar</text:span></text:p>
          </draw:text-box>
        </draw:frame>
        <draw:line draw:style-name="gr78" draw:text-style-name="P71" draw:layer="layout" svg:x1="8.488cm" svg:y1="28.258cm" svg:x2="8.488cm" svg:y2="27.199cm">
          <text:p/>
        </draw:line>
        <draw:path draw:style-name="gr62" draw:text-style-name="P62" draw:layer="layout" svg:width="0.317cm" svg:height="0.318cm" svg:x="8.781cm" svg:y="27.408cm" svg:viewBox="0 0 318 319" svg:d="M318 160c0-89-71-160-159-160s-159 71-159 160c0 88 71 159 159 159s159-71 159-159z">
          <text:p/>
        </draw:path>
        <draw:path draw:style-name="gr62" draw:text-style-name="P62" draw:layer="layout" svg:width="0.317cm" svg:height="0.318cm" svg:x="8.781cm" svg:y="27.408cm" svg:viewBox="0 0 318 319" svg:d="M318 160c0-89-71-160-159-160s-159 71-159 160c0 88 71 159 159 159s159-71 159-159z">
          <text:p/>
        </draw:path>
        <draw:line draw:style-name="gr78" draw:text-style-name="P71" draw:layer="layout" svg:x1="8.488cm" svg:y1="28.257cm" svg:x2="8.488cm" svg:y2="27.198cm">
          <text:p/>
        </draw:line>
        <draw:path draw:style-name="gr62" draw:text-style-name="P62" draw:layer="layout" svg:width="0.317cm" svg:height="0.318cm" svg:x="8.781cm" svg:y="27.407cm" svg:viewBox="0 0 318 319" svg:d="M318 160c0-89-71-160-159-160s-159 71-159 160c0 88 71 159 159 159s159-71 159-159z">
          <text:p/>
        </draw:path>
        <draw:path draw:style-name="gr62" draw:text-style-name="P62" draw:layer="layout" svg:width="0.317cm" svg:height="0.318cm" svg:x="8.781cm" svg:y="27.407cm" svg:viewBox="0 0 318 319" svg:d="M318 160c0-89-71-160-159-160s-159 71-159 160c0 88 71 159 159 159s159-71 159-159z">
          <text:p/>
        </draw:path>
        <draw:line draw:style-name="gr78" draw:text-style-name="P71" draw:layer="layout" svg:x1="8.484cm" svg:y1="28.415cm" svg:x2="8.484cm" svg:y2="27.356cm">
          <text:p/>
        </draw:line>
        <draw:path draw:style-name="gr62" draw:text-style-name="P62" draw:layer="layout" svg:width="0.317cm" svg:height="0.318cm" svg:x="8.777cm" svg:y="27.408cm" svg:viewBox="0 0 318 319" svg:d="M318 160c0-89-71-160-159-160s-159 71-159 160c0 88 71 159 159 159s159-71 159-159z">
          <text:p/>
        </draw:path>
        <draw:path draw:style-name="gr62" draw:text-style-name="P62" draw:layer="layout" svg:width="0.317cm" svg:height="0.318cm" svg:x="8.777cm" svg:y="27.408cm" svg:viewBox="0 0 318 319" svg:d="M318 160c0-89-71-160-159-160s-159 71-159 160c0 88 71 159 159 159s159-71 159-159z">
          <text:p/>
        </draw:path>
        <draw:frame draw:style-name="gr137" draw:text-style-name="P97" draw:layer="layout" svg:width="4.676cm" svg:height="0.602cm" svg:x="3.676cm" svg:y="27.31cm">
          <draw:text-box>
            <text:p text:style-name="P89"><text:span text:style-name="T34">Banu Prakash</text:span></text:p>
          </draw:text-box>
        </draw:frame>
        <draw:frame draw:style-name="gr147" draw:text-style-name="P98" draw:layer="layout" svg:width="3.355cm" svg:height="0.847cm" svg:x="4.044cm" svg:y="27.978cm">
          <draw:text-box>
            <text:p text:style-name="P89"><text:span text:style-name="T36">Documentation</text:span></text:p>
            <text:p text:style-name="P89"><text:span text:style-name="T36">lead</text:span></text:p>
          </draw:text-box>
        </draw:frame>
        <draw:path draw:style-name="gr62" draw:text-style-name="P62" draw:layer="layout" svg:width="0.317cm" svg:height="0.318cm" svg:x="3.247cm" svg:y="27.412cm" svg:viewBox="0 0 318 319" svg:d="M318 160c0-89-71-160-159-160s-159 71-159 160c0 88 71 159 159 159s159-71 159-159z">
          <text:p/>
        </draw:path>
        <draw:path draw:style-name="gr62" draw:text-style-name="P62" draw:layer="layout" svg:width="0.317cm" svg:height="0.318cm" svg:x="3.247cm" svg:y="27.412cm" svg:viewBox="0 0 318 319" svg:d="M318 160c0-89-71-160-159-160s-159 71-159 160c0 88 71 159 159 159s159-71 159-159z">
          <text:p/>
        </draw:path>
        <draw:path draw:style-name="gr62" draw:text-style-name="P62" draw:layer="layout" svg:width="0.317cm" svg:height="0.318cm" svg:x="3.243cm" svg:y="27.413cm" svg:viewBox="0 0 318 319" svg:d="M318 160c0-89-71-160-159-160s-159 71-159 160c0 88 71 159 159 159s159-71 159-159z">
          <text:p/>
        </draw:path>
        <draw:path draw:style-name="gr62" draw:text-style-name="P62" draw:layer="layout" svg:width="0.317cm" svg:height="0.318cm" svg:x="3.243cm" svg:y="27.413cm" svg:viewBox="0 0 318 319" svg:d="M318 160c0-89-71-160-159-160s-159 71-159 160c0 88 71 159 159 159s159-71 159-159z">
          <text:p/>
        </draw:path>
        <draw:path draw:style-name="gr62" draw:text-style-name="P62" draw:layer="layout" svg:width="0.317cm" svg:height="0.318cm" svg:x="3.243cm" svg:y="27.412cm" svg:viewBox="0 0 318 319" svg:d="M318 160c0-89-71-160-159-160s-159 71-159 160c0 88 71 159 159 159s159-71 159-159z">
          <text:p/>
        </draw:path>
        <draw:path draw:style-name="gr62" draw:text-style-name="P62" draw:layer="layout" svg:width="0.317cm" svg:height="0.318cm" svg:x="3.243cm" svg:y="27.412cm" svg:viewBox="0 0 318 319" svg:d="M318 160c0-89-71-160-159-160s-159 71-159 160c0 88 71 159 159 159s159-71 159-159z">
          <text:p/>
        </draw:path>
        <draw:path draw:style-name="gr62" draw:text-style-name="P62" draw:layer="layout" svg:width="0.317cm" svg:height="0.318cm" svg:x="3.239cm" svg:y="27.413cm" svg:viewBox="0 0 318 319" svg:d="M318 160c0-89-71-160-159-160s-159 71-159 160c0 88 71 159 159 159s159-71 159-159z">
          <text:p/>
        </draw:path>
        <draw:path draw:style-name="gr62" draw:text-style-name="P62" draw:layer="layout" svg:width="0.317cm" svg:height="0.318cm" svg:x="3.239cm" svg:y="27.413cm" svg:viewBox="0 0 318 319" svg:d="M318 160c0-89-71-160-159-160s-159 71-159 160c0 88 71 159 159 159s159-71 159-159z">
          <text:p/>
        </draw:path>
        <draw:line draw:style-name="gr78" draw:text-style-name="P71" draw:layer="layout" svg:x1="14.283cm" svg:y1="28.257cm" svg:x2="14.283cm" svg:y2="27.198cm">
          <text:p/>
        </draw:line>
        <draw:frame draw:style-name="gr148" draw:text-style-name="P98" draw:layer="layout" svg:width="4.633cm" svg:height="0.602cm" svg:x="15.24cm" svg:y="27.973cm">
          <draw:text-box>
            <text:p text:style-name="P89"><text:span text:style-name="T36">Requirements analyzer</text:span></text:p>
          </draw:text-box>
        </draw:frame>
        <draw:path draw:style-name="gr62" draw:text-style-name="P62" draw:layer="layout" svg:width="0.317cm" svg:height="0.318cm" svg:x="14.576cm" svg:y="27.407cm" svg:viewBox="0 0 318 319" svg:d="M318 160c0-89-71-160-159-160s-159 71-159 160c0 88 71 159 159 159s159-71 159-159z">
          <text:p/>
        </draw:path>
        <draw:path draw:style-name="gr62" draw:text-style-name="P62" draw:layer="layout" svg:width="0.317cm" svg:height="0.318cm" svg:x="14.576cm" svg:y="27.407cm" svg:viewBox="0 0 318 319" svg:d="M318 160c0-89-71-160-159-160s-159 71-159 160c0 88 71 159 159 159s159-71 159-159z">
          <text:p/>
        </draw:path>
        <draw:line draw:style-name="gr78" draw:text-style-name="P71" draw:layer="layout" svg:x1="14.279cm" svg:y1="28.258cm" svg:x2="14.279cm" svg:y2="27.199cm">
          <text:p/>
        </draw:line>
        <draw:path draw:style-name="gr62" draw:text-style-name="P62" draw:layer="layout" svg:width="0.317cm" svg:height="0.318cm" svg:x="14.572cm" svg:y="27.408cm" svg:viewBox="0 0 318 319" svg:d="M318 160c0-89-71-160-159-160s-159 71-159 160c0 88 71 159 159 159s159-71 159-159z">
          <text:p/>
        </draw:path>
        <draw:path draw:style-name="gr62" draw:text-style-name="P62" draw:layer="layout" svg:width="0.317cm" svg:height="0.318cm" svg:x="14.572cm" svg:y="27.408cm" svg:viewBox="0 0 318 319" svg:d="M318 160c0-89-71-160-159-160s-159 71-159 160c0 88 71 159 159 159s159-71 159-159z">
          <text:p/>
        </draw:path>
        <draw:line draw:style-name="gr78" draw:text-style-name="P71" draw:layer="layout" svg:x1="14.279cm" svg:y1="28.257cm" svg:x2="14.279cm" svg:y2="27.198cm">
          <text:p/>
        </draw:line>
        <draw:path draw:style-name="gr62" draw:text-style-name="P62" draw:layer="layout" svg:width="0.317cm" svg:height="0.318cm" svg:x="14.572cm" svg:y="27.407cm" svg:viewBox="0 0 318 319" svg:d="M318 160c0-89-71-160-159-160s-159 71-159 160c0 88 71 159 159 159s159-71 159-159z">
          <text:p/>
        </draw:path>
        <draw:path draw:style-name="gr62" draw:text-style-name="P62" draw:layer="layout" svg:width="0.317cm" svg:height="0.318cm" svg:x="14.572cm" svg:y="27.407cm" svg:viewBox="0 0 318 319" svg:d="M318 160c0-89-71-160-159-160s-159 71-159 160c0 88 71 159 159 159s159-71 159-159z">
          <text:p/>
        </draw:path>
        <draw:line draw:style-name="gr78" draw:text-style-name="P71" draw:layer="layout" svg:x1="14.275cm" svg:y1="28.466cm" svg:x2="14.275cm" svg:y2="27.407cm">
          <text:p/>
        </draw:line>
        <draw:path draw:style-name="gr62" draw:text-style-name="P62" draw:layer="layout" svg:width="0.317cm" svg:height="0.318cm" svg:x="14.568cm" svg:y="27.408cm" svg:viewBox="0 0 318 319" svg:d="M318 160c0-89-71-160-159-160s-159 71-159 160c0 88 71 159 159 159s159-71 159-159z">
          <text:p/>
        </draw:path>
        <draw:path draw:style-name="gr62" draw:text-style-name="P62" draw:layer="layout" svg:width="0.317cm" svg:height="0.318cm" svg:x="14.568cm" svg:y="27.408cm" svg:viewBox="0 0 318 319" svg:d="M318 160c0-89-71-160-159-160s-159 71-159 160c0 88 71 159 159 159s159-71 159-159z">
          <text:p/>
        </draw:path>
        <draw:frame draw:style-name="gr137" draw:text-style-name="P97" draw:layer="layout" svg:width="4.676cm" svg:height="0.602cm" svg:x="15.009cm" svg:y="27.305cm">
          <draw:text-box>
            <text:p text:style-name="P89"><text:span text:style-name="T34">Goutham E</text:span></text:p>
          </draw:text-box>
        </draw:frame>
        <draw:frame draw:style-name="gr149" draw:text-style-name="P100" draw:layer="layout" svg:width="0.874cm" svg:height="0.838cm" svg:x="2.134cm" svg:y="21.069cm">
          <draw:text-box>
            <text:p text:style-name="P99"><text:span text:style-name="T37">₹</text:span></text:p>
          </draw:text-box>
        </draw:frame>
        <draw:frame draw:style-name="gr149" draw:text-style-name="P100" draw:layer="layout" svg:width="0.874cm" svg:height="0.838cm" svg:x="4.127cm" svg:y="21.069cm">
          <draw:text-box>
            <text:p text:style-name="P99"><text:span text:style-name="T37">₹</text:span></text:p>
          </draw:text-box>
        </draw:frame>
        <draw:frame draw:style-name="gr149" draw:text-style-name="P100" draw:layer="layout" svg:width="0.874cm" svg:height="0.838cm" svg:x="8.968cm" svg:y="21.069cm">
          <draw:text-box>
            <text:p text:style-name="P99"><text:span text:style-name="T37">₹</text:span></text:p>
          </draw:text-box>
        </draw:frame>
        <draw:frame draw:style-name="gr149" draw:text-style-name="P100" draw:layer="layout" svg:width="0.874cm" svg:height="0.838cm" svg:x="10.668cm" svg:y="21.069cm">
          <draw:text-box>
            <text:p text:style-name="P99"><text:span text:style-name="T37">₹</text:span></text:p>
          </draw:text-box>
        </draw:frame>
        <draw:frame draw:style-name="gr149" draw:text-style-name="P101" draw:layer="layout" svg:width="0.874cm" svg:height="0.838cm" svg:x="16.192cm" svg:y="21.057cm">
          <draw:text-box>
            <text:p text:style-name="P99"><text:span text:style-name="T38">₹</text:span></text:p>
          </draw:text-box>
        </draw:frame>
        <draw:frame draw:style-name="gr150" draw:text-style-name="P102" draw:layer="layout" svg:width="3.05cm" svg:height="0.628cm" svg:x="16.637cm" svg:y="22.428cm">
          <draw:text-box>
            <text:p><text:span text:style-name="T39">Contact now</text:span></text:p>
          </draw:text-box>
        </draw:frame>
        <draw:frame draw:style-name="gr151" draw:text-style-name="P103" draw:layer="layout" svg:width="4.127cm" svg:height="1.905cm" svg:x="16.827cm" svg:y="23.177cm">
          <draw:text-box>
            <text:p><text:span text:style-name="T40">| 7899929173 ,</text:span></text:p>
            <text:p><text:span text:style-name="T40"><text:s text:c="2"/></text:span><text:span text:style-name="T40">8217244152 ,</text:span></text:p>
            <text:p><text:span text:style-name="T40"><text:s text:c="2"/></text:span><text:span text:style-name="T40">8073254261 |</text:span></text:p>
          </draw:text-box>
        </draw:frame>
        <draw:frame draw:style-name="gr149" draw:text-style-name="P100" draw:layer="layout" svg:width="0.52cm" svg:height="0.838cm" svg:x="3.708cm" svg:y="14.503cm">
          <draw:text-box>
            <text:p text:style-name="P99"><text:span text:style-name="T37">₹</text:span></text:p>
          </draw:text-box>
        </draw:frame>
        <draw:frame draw:style-name="gr149" draw:text-style-name="P100" draw:layer="layout" svg:width="0.52cm" svg:height="0.838cm" svg:x="10.566cm" svg:y="14.503cm">
          <draw:text-box>
            <text:p text:style-name="P99"><text:span text:style-name="T37">₹</text:span></text:p>
          </draw:text-box>
        </draw:frame>
        <draw:frame draw:style-name="gr149" draw:text-style-name="P101" draw:layer="layout" svg:width="0.52cm" svg:height="0.838cm" svg:x="17.12cm" svg:y="14.503cm">
          <draw:text-box>
            <text:p text:style-name="P99"><text:span text:style-name="T38">₹</text:span></text:p>
          </draw:text-box>
        </draw:frame>
        <draw:frame draw:style-name="gr152" draw:text-style-name="P104" draw:layer="layout" svg:width="3.412cm" svg:height="3.175cm" svg:x="12.7cm" svg:y="4.445cm">
          <draw:image xlink:href="Pictures/10000001000003E8000003E81FA57000.png" xlink:type="simple" xlink:show="embed" xlink:actuate="onLoad" draw:mime-type="image/png">
            <text:p/>
          </draw:image>
        </draw:frame>
        <draw:frame draw:style-name="gr153" draw:text-style-name="P106" draw:layer="layout" svg:width="1.056cm" svg:height="0.938cm" svg:x="4.341cm" svg:y="5.563cm">
          <draw:text-box>
            <text:p text:style-name="P105"><text:span text:style-name="T41">🔍︎</text:span></text:p>
          </draw:text-box>
        </draw:frame>
        <draw:frame draw:style-name="gr154" draw:text-style-name="P108" draw:layer="layout" svg:width="4.731cm" svg:height="0.547cm" svg:x="5.207cm" svg:y="5.613cm">
          <draw:text-box>
            <text:p text:style-name="P107"><text:span text:style-name="T42">: </text:span><text:span text:style-name="T42">Proje</text:span><text:span text:style-name="T42">ct </text:span><text:span text:style-name="T42">studi</text:span><text:span text:style-name="T42">o for </text:span><text:span text:style-name="T42">CSE</text:span></text:p>
          </draw:text-box>
        </draw:frame>
        <draw:frame draw:style-name="gr154" draw:text-style-name="P110" draw:layer="layout" svg:width="1.717cm" svg:height="1.513cm" svg:x="10.665cm" svg:y="5.08cm">
          <draw:text-box>
            <text:p text:style-name="P109"><text:span text:style-name="T43">OR</text:span></text:p>
            <text:p text:style-name="P109"><text:span text:style-name="T43">Scan </text:span><text:span text:style-name="T43">the </text:span></text:p>
            <text:p text:style-name="P109"><text:span text:style-name="T43">QR </text:span><text:span text:style-name="T43">Cod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ZapfDingbats" svg:font-family="ZapfDingbat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226" draw:style="rect" draw:dots1="1" draw:dots1-length="0.141cm" draw:distance="0.105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07T22:48:38.585148530</dc:date>
    <meta:editing-duration>PT14M46S</meta:editing-duration>
    <meta:editing-cycles>3</meta:editing-cycles>
    <meta:generator>LibreOffice/24.2.7.2$Linux_X86_64 LibreOffice_project/420$Build-2</meta:generator>
    <meta:document-statistic meta:object-count="266"/>
  </office:meta>
</office:document-meta>
</file>